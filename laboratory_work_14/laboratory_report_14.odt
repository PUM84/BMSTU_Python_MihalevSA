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12in" style:use-optimal-column-width="false"/>
    </style:style>
    <style:style style:name="TableColumn3" style:family="table-column">
      <style:table-column-properties style:column-width="5.3465in" style:use-optimal-column-width="false"/>
    </style:style>
    <style:style style:name="Table1" style:family="table" style:master-page-name="MPF0">
      <style:table-properties style:width="7.0777in" fo:margin-left="0in" table:align="righ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en" fo:country="U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6" style:family="table-row">
      <style:table-row-properties style:min-row-height="0.0888in" style:use-optimal-row-height="false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  <style:text-properties style:language-asian="ru" style:country-asian="RU" style:language-complex="ar" style:country-complex="SA"/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65" style:parent-style-name="Основнойшрифтабзаца" style:family="text">
      <style:text-properties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P6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69" style:parent-style-name="Основнойшрифтабзаца" style:family="text">
      <style:text-properties fo:language="en" fo:country="GB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Заголовок1" style:family="paragraph">
      <style:text-properties style:language-asian="ru" style:country-asian="RU" style:language-complex="ar" style:country-complex="SA"/>
    </style:style>
    <style:style style:name="P72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73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74" style:parent-style-name="Обычный" style:family="paragraph">
      <style:paragraph-properties style:vertical-align="auto" fo:background-color="#FFFFFF"/>
      <style:text-properties fo:hyphenate="true"/>
    </style:style>
    <style:style style:name="T75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78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79" style:parent-style-name="Обычный" style:family="paragraph">
      <style:paragraph-properties style:vertical-align="auto" fo:background-color="#FFFFFF"/>
      <style:text-properties fo:hyphenate="true"/>
    </style:style>
    <style:style style:name="T80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82" style:parent-style-name="Обычный" style:family="paragraph">
      <style:paragraph-properties style:vertical-align="auto" fo:background-color="#FFFFFF"/>
      <style:text-properties fo:hyphenate="true"/>
    </style:style>
    <style:style style:name="T83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85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86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87" style:parent-style-name="Обычный" style:family="paragraph">
      <style:paragraph-properties style:vertical-align="auto" fo:background-color="#FFFFFF"/>
      <style:text-properties fo:hyphenate="true"/>
    </style:style>
    <style:style style:name="T88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90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91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92" style:parent-style-name="Обычный" style:family="paragraph">
      <style:paragraph-properties style:vertical-align="auto" fo:background-color="#FFFFFF"/>
      <style:text-properties fo:hyphenate="true"/>
    </style:style>
    <style:style style:name="T93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96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97" style:parent-style-name="Обычный" style:family="paragraph">
      <style:paragraph-properties style:vertical-align="auto" fo:background-color="#FFFFFF"/>
      <style:text-properties fo:hyphenate="true"/>
    </style:style>
    <style:style style:name="T98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00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01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02" style:parent-style-name="Обычный" style:family="paragraph">
      <style:paragraph-properties style:vertical-align="auto" fo:background-color="#FFFFFF"/>
      <style:text-properties fo:hyphenate="true"/>
    </style:style>
    <style:style style:name="T103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05" style:parent-style-name="Обычный" style:family="paragraph">
      <style:paragraph-properties style:vertical-align="auto" fo:background-color="#FFFFFF"/>
      <style:text-properties fo:hyphenate="true"/>
    </style:style>
    <style:style style:name="T106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08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109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10" style:parent-style-name="Обычный" style:family="paragraph">
      <style:paragraph-properties style:vertical-align="auto" fo:background-color="#FFFFFF"/>
      <style:text-properties fo:hyphenate="true"/>
    </style:style>
    <style:style style:name="T111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13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14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15" style:parent-style-name="Обычный" style:family="paragraph">
      <style:paragraph-properties style:vertical-align="auto" fo:background-color="#FFFFFF"/>
      <style:text-properties fo:hyphenate="true"/>
    </style:style>
    <style:style style:name="T116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18" style:parent-style-name="Обычный" style:family="paragraph">
      <style:paragraph-properties style:vertical-align="auto" fo:background-color="#FFFFFF"/>
      <style:text-properties fo:hyphenate="true"/>
    </style:style>
    <style:style style:name="T119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21" style:parent-style-name="Обычный" style:family="paragraph">
      <style:paragraph-properties style:vertical-align="auto" fo:background-color="#FFFFFF"/>
      <style:text-properties fo:hyphenate="true"/>
    </style:style>
    <style:style style:name="T122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24" style:parent-style-name="Обычный" style:family="paragraph">
      <style:paragraph-properties style:vertical-align="auto" fo:background-color="#FFFFFF"/>
      <style:text-properties fo:hyphenate="true"/>
    </style:style>
    <style:style style:name="T125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27" style:parent-style-name="Обычный" style:family="paragraph">
      <style:paragraph-properties style:vertical-align="auto" fo:background-color="#FFFFFF"/>
      <style:text-properties fo:hyphenate="true"/>
    </style:style>
    <style:style style:name="T128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31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32" style:parent-style-name="Обычный" style:family="paragraph">
      <style:paragraph-properties style:vertical-align="auto" fo:background-color="#FFFFFF"/>
      <style:text-properties fo:hyphenate="true"/>
    </style:style>
    <style:style style:name="T133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35" style:parent-style-name="Обычный" style:family="paragraph">
      <style:paragraph-properties style:vertical-align="auto" fo:background-color="#FFFFFF"/>
      <style:text-properties fo:hyphenate="true"/>
    </style:style>
    <style:style style:name="T136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38" style:parent-style-name="Обычный" style:family="paragraph">
      <style:paragraph-properties style:vertical-align="auto" fo:background-color="#FFFFFF"/>
      <style:text-properties fo:hyphenate="true"/>
    </style:style>
    <style:style style:name="T139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46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147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48" style:parent-style-name="Обычный" style:family="paragraph">
      <style:paragraph-properties style:vertical-align="auto" fo:background-color="#FFFFFF"/>
      <style:text-properties fo:hyphenate="true"/>
    </style:style>
    <style:style style:name="T149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51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52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fo:background-color="#FFFFFF"/>
      <style:text-properties fo:hyphenate="true"/>
    </style:style>
    <style:style style:name="T154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56" style:parent-style-name="Обычный" style:family="paragraph">
      <style:paragraph-properties style:vertical-align="auto" fo:background-color="#FFFFFF"/>
      <style:text-properties fo:hyphenate="true"/>
    </style:style>
    <style:style style:name="T157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59" style:parent-style-name="Обычный" style:family="paragraph">
      <style:paragraph-properties style:vertical-align="auto" fo:background-color="#FFFFFF"/>
      <style:text-properties fo:hyphenate="true"/>
    </style:style>
    <style:style style:name="T160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62" style:parent-style-name="Обычный" style:family="paragraph">
      <style:paragraph-properties style:vertical-align="auto" fo:background-color="#FFFFFF"/>
      <style:text-properties fo:hyphenate="true"/>
    </style:style>
    <style:style style:name="T163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65" style:parent-style-name="Обычный" style:family="paragraph">
      <style:paragraph-properties style:vertical-align="auto" fo:background-color="#FFFFFF"/>
      <style:text-properties fo:hyphenate="true"/>
    </style:style>
    <style:style style:name="T166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68" style:parent-style-name="Обычный" style:family="paragraph">
      <style:paragraph-properties style:vertical-align="auto" fo:background-color="#FFFFFF"/>
      <style:text-properties fo:hyphenate="true"/>
    </style:style>
    <style:style style:name="T169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71" style:parent-style-name="Обычный" style:family="paragraph">
      <style:paragraph-properties style:vertical-align="auto" fo:background-color="#FFFFFF"/>
      <style:text-properties fo:hyphenate="true"/>
    </style:style>
    <style:style style:name="T172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74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175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176" style:parent-style-name="Обычный" style:family="paragraph">
      <style:paragraph-properties style:vertical-align="auto" fo:background-color="#FFFFFF"/>
      <style:text-properties fo:hyphenate="true"/>
    </style:style>
    <style:style style:name="T177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79" style:parent-style-name="Обычный" style:family="paragraph">
      <style:paragraph-properties style:vertical-align="auto" fo:background-color="#FFFFFF"/>
      <style:text-properties fo:hyphenate="true"/>
    </style:style>
    <style:style style:name="T180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82" style:parent-style-name="Обычный" style:family="paragraph">
      <style:paragraph-properties style:vertical-align="auto" fo:background-color="#FFFFFF"/>
      <style:text-properties fo:hyphenate="true"/>
    </style:style>
    <style:style style:name="T183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 fo:background-color="#FFFFFF"/>
      <style:text-properties fo:hyphenate="true"/>
    </style:style>
    <style:style style:name="T186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fo:background-color="#FFFFFF"/>
      <style:text-properties fo:hyphenate="true"/>
    </style:style>
    <style:style style:name="T189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91" style:parent-style-name="Обычный" style:family="paragraph">
      <style:paragraph-properties style:vertical-align="auto" fo:background-color="#FFFFFF"/>
      <style:text-properties fo:hyphenate="true"/>
    </style:style>
    <style:style style:name="T192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fo:background-color="#FFFFFF"/>
      <style:text-properties fo:hyphenate="true"/>
    </style:style>
    <style:style style:name="T200" style:parent-style-name="Основнойшрифтабзаца" style:family="text">
      <style:text-properties style:font-name-asian="Times New Roman" style:font-name-complex="Courier New" fo:color="#0F1115" style:letter-kerning="false" fo:font-size="10.5pt" style:font-size-asian="10.5pt" style:font-size-complex="10.5pt" fo:background-color="#EBEEF2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202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03" style:parent-style-name="Заголовок1" style:family="paragraph">
      <style:text-properties style:language-asian="ru" style:country-asian="RU" style:language-complex="ar" style:country-complex="SA"/>
    </style:style>
    <style:style style:name="P204" style:parent-style-name="Обычный" style:family="paragraph">
      <style:paragraph-properties style:vertical-align="auto" fo:margin-top="0.1666in" fo:margin-bottom="0.1666in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206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09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1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1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12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213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215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16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17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18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219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2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2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3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224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6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28" style:parent-style-name="Обычный" style:family="paragraph">
      <style:paragraph-properties style:vertical-align="auto" fo:margin-bottom="0.0833in" fo:background-color="#FFFFFF"/>
      <style:text-properties fo:hyphenate="true"/>
    </style:style>
    <style:style style:name="T229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30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31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32" style:parent-style-name="Обычный" style:family="paragraph">
      <style:paragraph-properties style:vertical-align="auto" fo:background-color="#FFFFFF"/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 fo:hyphenate="true"/>
    </style:style>
    <style:style style:name="P233" style:parent-style-name="Обычный" style:family="paragraph">
      <style:paragraph-properties style:vertical-align="auto" fo:margin-top="0.1666in" fo:margin-bottom="0.1666in" fo:background-color="#FFFFFF"/>
      <style:text-properties fo:hyphenate="true"/>
    </style:style>
    <style:style style:name="T234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P235" style:parent-style-name="Обычный" style:family="paragraph">
      <style:paragraph-properties style:vertical-align="auto" fo:background-color="#FFFFFF"/>
      <style:text-properties fo:hyphenate="true"/>
    </style:style>
    <style:style style:name="T236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fo:background-color="#FFFFFF"/>
      <style:text-properties fo:hyphenate="true"/>
    </style:style>
    <style:style style:name="T239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241" style:parent-style-name="Обычный" style:family="paragraph">
      <style:paragraph-properties style:vertical-align="auto" fo:background-color="#FFFFFF"/>
      <style:text-properties fo:hyphenate="true"/>
    </style:style>
    <style:style style:name="T242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244" style:parent-style-name="Обычный" style:family="paragraph">
      <style:paragraph-properties style:vertical-align="auto" fo:background-color="#FFFFFF"/>
      <style:text-properties fo:hyphenate="true"/>
    </style:style>
    <style:style style:name="T245" style:parent-style-name="Основнойшрифтабзаца" style:family="text">
      <style:text-properties style:font-name-asian="Times New Roman" style:font-name-complex="Segoe UI" fo:font-weight="bold" style:font-weight-asian="bold" style:font-weight-complex="bold" fo:color="#0F1115" style:letter-kerning="false" fo:font-size="12pt" style:font-size-asian="12pt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-asian="Times New Roman" style:font-name-complex="Segoe UI" fo:color="#0F1115" style:letter-kerning="false" fo:font-size="12pt" style:font-size-asian="12pt" style:language-asian="ru" style:country-asian="RU" style:language-complex="ar" style:country-complex="SA"/>
    </style:style>
    <style:style style:name="P247" style:parent-style-name="Standard" style:family="paragraph"/>
    <style:style style:name="P248" style:parent-style-name="Standard" style:family="paragraph"/>
    <style:style style:name="P249" style:parent-style-name="Standard" style:family="paragraph"/>
    <style:style style:name="P250" style:parent-style-name="Standard" style:family="paragraph"/>
    <style:style style:name="P251" style:parent-style-name="Обычный" style:family="paragraph">
      <style:text-properties style:font-name-complex="Calibri Light" fo:font-style="italic" style:font-style-asian="italic" style:font-style-complex="italic"/>
    </style:style>
    <style:style style:name="P252" style:parent-style-name="Обычный" style:family="paragraph">
      <style:text-properties fo:font-style="italic" style:font-style-asian="italic" style:font-style-complex="italic"/>
    </style:style>
    <style:style style:name="P253" style:parent-style-name="Обычный" style:family="paragraph">
      <style:text-properties fo:font-style="italic" style:font-style-asian="italic" style:font-style-complex="italic"/>
    </style:style>
    <style:style style:name="P254" style:parent-style-name="Обычный" style:family="paragraph">
      <style:text-properties fo:font-style="italic" style:font-style-asian="italic" style:font-style-complex="italic"/>
    </style:style>
    <style:style style:name="P255" style:parent-style-name="Заголовок1" style:family="paragraph">
      <style:paragraph-properties fo:text-align="start" fo:text-indent="0.4923in"/>
    </style:style>
    <style:style style:name="P256" style:parent-style-name="Заголовок1" style:family="paragraph">
      <style:paragraph-properties fo:text-align="start" fo:text-indent="0.4923in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 <text:span text:style-name="T18">1</text:span>4</text:p>
      <text:p text:style-name="Standard"/>
      <text:p text:style-name="Подзаголовок"><text:span text:style-name="T19">«</text:span>Классы в<text:s/><text:span text:style-name="T20">Python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<text:span text:style-name="T31">4</text:span>9</text:p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Содержимоетаблицыпоцентру">С.А. Михалев</text:p>
          </table:table-cell>
        </table:table-row>
        <table:table-row table:style-name="TableRow36">
          <table:table-cell table:style-name="TableCell37">
            <text:p text:style-name="Примечание"/>
          </table:table-cell>
          <table:table-cell table:style-name="TableCell38">
            <text:p text:style-name="Примечание">(группа)</text:p>
          </table:table-cell>
          <table:table-cell table:style-name="TableCell39">
            <text:p text:style-name="Примечание"/>
          </table:table-cell>
          <table:table-cell table:style-name="TableCell40">
            <text:p text:style-name="Примечание">(подпись)</text:p>
          </table:table-cell>
          <table:table-cell table:style-name="TableCell41">
            <text:p text:style-name="Примечание"/>
          </table:table-cell>
          <table:table-cell table:style-name="TableCell42">
            <text:p text:style-name="Примечание">(И.О. Фамилия)</text:p>
          </table:table-cell>
        </table:table-row>
        <table:table-row table:style-name="TableRow43">
          <table:table-cell table:style-name="TableCell44">
            <text:p text:style-name="TableContents">Проверил</text:p>
          </table:table-cell>
          <table:table-cell table:style-name="TableCell45">
            <text:p text:style-name="TableContents">ассистент кафедры ИУ10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Содержимоетаблицыпоцентру">М.А. Наткин</text:p>
          </table:table-cell>
        </table:table-row>
        <table:table-row table:style-name="TableRow50"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>(подпись)</text:p>
          </table:table-cell>
          <table:table-cell table:style-name="TableCell55">
            <text:p text:style-name="Примечание"/>
          </table:table-cell>
          <table:table-cell table:style-name="TableCell56">
            <text:p text:style-name="Примечание">(И.О. Фамилия)</text:p>
          </table:table-cell>
        </table:table-row>
      </table:table>
      <text:p text:style-name="Standard"/>
      <text:p text:style-name="P57"/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9">Содержание</text:p>
          <text:p text:style-name="P60"><text:a xlink:href="#__RefHeading___Toc1324_2508171050" office:target-frame-name="_top" xlink:show="replace">Постановка задачи<text:tab/>3</text:a></text:p>
          <text:p text:style-name="P61"><text:a xlink:href="#__RefHeading___Toc1326_2508171050" office:target-frame-name="_top" xlink:show="replace">Теоретическая часть<text:tab/>3</text:a></text:p>
          <text:p text:style-name="P62"><text:a xlink:href="#__RefHeading___Toc1328_2508171050" office:target-frame-name="_top" xlink:show="replace">Листинг программы<text:tab/></text:a>3</text:p>
          <text:p text:style-name="P63">Структура классов программы<text:tab/>3</text:p>
          <text:p text:style-name="P64"><text:span text:style-name="T65">Описание работы программы</text:span><text:span text:style-name="T66"><text:tab/>4</text:span></text:p>
          <text:p text:style-name="P67"><text:a xlink:href="#__RefHeading___Toc1330_2508171050" office:target-frame-name="_top" xlink:show="replace">Результат работы программы<text:tab/>5</text:a></text:p>
          <text:p text:style-name="P68"><text:a xlink:href="#__RefHeading___Toc1332_2508171050" office:target-frame-name="_top" xlink:show="replace">Список использованной литературы и материалов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<text:bookmark-start text:name="__RefHeading___Toc1324_2508171050"/><text:soft-page-break/>Постановка задачи<text:bookmark-end text:name="__RefHeading___Toc1324_2508171050"/></text:h>
      <text:p text:style-name="Standard"><text:s/>В соответствии с заданием к лабораторной работе №14 необходимо выполнить следующие задачи:</text:p>
      <text:p text:style-name="Standard"><text:s/>1. Переписать программный код лабораторной работы №7 (построение графика кусочно-заданной функции с использованием библиотеки turtle) с использованием классов языка Python.</text:p>
      <text:p text:style-name="Standard"><text:s/>2. Переписать программный код лабораторной работы №8 (построение графиков функций с использованием библиотеки tkinter, рядов Тейлора и аналитических вычислений) с использованием классов языка Python.</text:p>
      <text:p text:style-name="Standard"><text:s/>3. Оформить отчет.</text:p>
      <text:p text:style-name="Standard"/>
      <text:h text:style-name="Заголовок1" text:outline-level="1"><text:bookmark-start text:name="__RefHeading___Toc1326_2508171050"/>Теоретическая часть<text:bookmark-end text:name="__RefHeading___Toc1326_2508171050"/></text:h>
      <text:p text:style-name="Standard"><text:s/>Объектно-ориентированное программирование (ООП) в Python позволяет организовывать код в виде классов и объектов, что обеспечивает модульность, переиспользование и удобство сопровождения программ. Основные принципы ООП:</text:p>
      <text:p text:style-name="Standard"><text:s/>- Инкапсуляция: объединение данных и методов внутри класса, скрытие внутренней реализации.</text:p>
      <text:p text:style-name="Standard"><text:s/>- Наследование: создание новых классов на основе существующих.</text:p>
      <text:p text:style-name="Standard"><text:s/>- Полиморфизм: возможность использования объектов разных классов через единый интерфейс.</text:p>
      <text:p text:style-name="Standard"/>
      <text:p text:style-name="Standard"><text:s/>В данной работе применяются следующие концепции:</text:p>
      <text:p text:style-name="Standard"><text:s/>- Классы для представления математических объектов (ряды Тейлора, аналитические функции).</text:p>
      <text:p text:style-name="Standard"><text:s/>- Классы для управления графическим интерфейсом и отрисовкой.</text:p>
      <text:p text:style-name="Standard"><text:s/>- Разделение ответственности: каждый класс выполняет строго определённую задачу.</text:p>
      <text:p text:style-name="Standard"><text:s/>- Использование специального метода __init__ для инициализации объектов.</text:p>
      <text:p text:style-name="Standard"><text:s/>- Инкапсуляция вспомогательных методов (с префиксом _) для внутреннего использования.</text:p>
      <text:p text:style-name="Standard"/>
      <text:h text:style-name="Заголовок1" text:outline-level="1"><text:bookmark-start text:name="__RefHeading___Toc1328_2508171050"/>Листинг программы<text:bookmark-end text:name="__RefHeading___Toc1328_2508171050"/></text:h>
      <text:p text:style-name="Standard"><text:s/>Исходный код программы (листинг) размещен в репозитории GitHub по адресу:</text:p>
      <text:p text:style-name="Standard"><text:s/>https://github.com/<text:span text:style-name="T69">PUM</text:span>84/BMSTU_Python_<text:span text:style-name="T70">MihalevSA</text:span></text:p>
      <text:p text:style-name="Standard"/>
      <text:h text:style-name="P71" text:outline-level="1">Структура классов программы:</text:h>
      <text:p text:style-name="P72"><text:span text:style-name="T73">1. Класс TaylorSeries</text:span></text:p>
      <text:list text:style-name="LFO8" text:continue-numbering="true">
        <text:list-item>
          <text:p text:style-name="P74"><text:span text:style-name="T75">Назначение:</text:span><text:span text:style-name="T76"> Вычисление значения функции e^x с помощью разложения в ряд Тейлора</text:span></text:p>
        </text:list-item>
        <text:list-item>
          <text:p text:style-name="P77"><text:span text:style-name="T78">Атрибуты:</text:span></text:p>
          <text:list text:continue-numbering="true">
            <text:list-item>
              <text:p text:style-name="P79"><text:span text:style-name="T80">eps</text:span><text:span text:style-name="T81"> — точность вычислений (по умолчанию 1e-6)</text:span></text:p>
            </text:list-item>
            <text:list-item>
              <text:p text:style-name="P82"><text:span text:style-name="T83">max_iter</text:span><text:span text:style-name="T84"> — максимальное количество итераций (по умолчанию 1000)</text:span></text:p>
            </text:list-item>
          </text:list>
        </text:list-item>
        <text:list-item>
          <text:p text:style-name="P85"><text:span text:style-name="T86">Методы:</text:span></text:p>
          <text:list text:continue-numbering="true">
            <text:list-item>
              <text:p text:style-name="P87"><text:span text:style-name="T88">calculate(x)</text:span><text:span text:style-name="T89"> — вычисление значения функции в точке x с заданной точностью</text:span></text:p>
            </text:list-item>
          </text:list>
        </text:list-item>
      </text:list>
      <text:p text:style-name="P90"><text:span text:style-name="T91">2. Класс AnalyticFunction</text:span></text:p>
      <text:list text:style-name="LFO9" text:continue-numbering="true">
        <text:list-item>
          <text:p text:style-name="P92"><text:span text:style-name="T93">Назначение:</text:span><text:span text:style-name="T94"> Представление аналитической функции z(x) = e^x + b</text:span></text:p>
        </text:list-item>
        <text:list-item>
          <text:p text:style-name="P95"><text:span text:style-name="T96">Атрибуты:</text:span></text:p>
          <text:list text:continue-numbering="true">
            <text:list-item>
              <text:p text:style-name="P97"><text:span text:style-name="T98">b</text:span><text:span text:style-name="T99"> — параметр смещения графика по оси Y (по умолчанию 0.0)</text:span></text:p>
            </text:list-item>
          </text:list>
        </text:list-item>
        <text:list-item>
          <text:p text:style-name="P100"><text:span text:style-name="T101">Методы:</text:span></text:p>
          <text:list text:continue-numbering="true">
            <text:list-item>
              <text:p text:style-name="P102"><text:span text:style-name="T103">set_offset(b)</text:span><text:span text:style-name="T104"> — установка нового значения параметра смещения</text:span></text:p>
            </text:list-item>
            <text:list-item>
              <text:p text:style-name="P105"><text:span text:style-name="T106">calculate(x)</text:span><text:span text:style-name="T107"> — вычисление значения функции в точке x</text:span></text:p>
            </text:list-item>
          </text:list>
        </text:list-item>
      </text:list>
      <text:p text:style-name="P108"><text:span text:style-name="T109">3. Класс GraphCanvas</text:span></text:p>
      <text:list text:style-name="LFO10" text:continue-numbering="true">
        <text:list-item>
          <text:p text:style-name="P110"><text:span text:style-name="T111">Назначение:</text:span><text:span text:style-name="T112"> Управление отображением координатной сетки и графиков на холсте tkinter</text:span></text:p>
        </text:list-item>
        <text:list-item>
          <text:p text:style-name="P113"><text:span text:style-name="T114">Атрибуты:</text:span></text:p>
          <text:list text:continue-numbering="true">
            <text:list-item>
              <text:p text:style-name="P115"><text:span text:style-name="T116">canvas</text:span><text:span text:style-name="T117"> — ссылка на холст для рисования</text:span></text:p>
            </text:list-item>
            <text:list-item>
              <text:p text:style-name="P118"><text:span text:style-name="T119">x_min, x_max, y_min, y_max</text:span><text:span text:style-name="T120"> — границы отображения</text:span></text:p>
            </text:list-item>
            <text:list-item>
              <text:p text:style-name="P121"><text:span text:style-name="T122">step</text:span><text:span text:style-name="T123"> — шаг между делениями на осях</text:span></text:p>
            </text:list-item>
            <text:list-item>
              <text:p text:style-name="P124"><text:span text:style-name="T125">width, height</text:span><text:span text:style-name="T126"> — размеры холста в пикселях</text:span></text:p>
            </text:list-item>
            <text:list-item>
              <text:p text:style-name="P127"><text:span text:style-name="T128">kx, ky</text:span><text:span text:style-name="T129"> — коэффициенты масштабирования</text:span></text:p>
            </text:list-item>
          </text:list>
        </text:list-item>
        <text:list-item>
          <text:p text:style-name="P130"><text:span text:style-name="T131">Методы:</text:span></text:p>
          <text:list text:continue-numbering="true">
            <text:list-item>
              <text:p text:style-name="P132"><text:span text:style-name="T133">update_params(x_min, x_max, y_min, y_max, step)</text:span><text:span text:style-name="T134"> — обновление параметров отображения</text:span></text:p>
            </text:list-item>
            <text:list-item>
              <text:p text:style-name="P135"><text:span text:style-name="T136">draw_axes()</text:span><text:span text:style-name="T137"> — построение координатных осей с разметкой</text:span></text:p>
            </text:list-item>
            <text:list-item>
              <text:p text:style-name="P138"><text:span text:style-name="T139">draw_function(func, color, legend_text)</text:span><text:span text:style-name="T140"> —<text:s/></text:span><text:span text:style-name="T141">построение</text:span><text:span text:style-name="T142"><text:s/></text:span><text:span text:style-name="T143">графика</text:span><text:span text:style-name="T144"><text:s/></text:span><text:span text:style-name="T145">функции</text:span></text:p>
            </text:list-item>
          </text:list>
        </text:list-item>
      </text:list>
      <text:p text:style-name="P146"><text:span text:style-name="T147">4. Класс Application</text:span></text:p>
      <text:list text:style-name="LFO11" text:continue-numbering="true">
        <text:list-item>
          <text:p text:style-name="P148"><text:span text:style-name="T149">Назначение:</text:span><text:span text:style-name="T150"> Главный класс приложения, управляющий графическим интерфейсом</text:span></text:p>
        </text:list-item>
        <text:list-item>
          <text:p text:style-name="P151"><text:span text:style-name="T152">Атрибуты:</text:span></text:p>
          <text:list text:continue-numbering="true">
            <text:list-item>
              <text:p text:style-name="P153"><text:span text:style-name="T154">root</text:span><text:span text:style-name="T155"> — корневое окно tkinter</text:span></text:p>
            </text:list-item>
            <text:list-item>
              <text:p text:style-name="P156"><text:span text:style-name="T157">canvas</text:span><text:span text:style-name="T158"> — холст для рисования</text:span></text:p>
            </text:list-item>
            <text:list-item>
              <text:p text:style-name="P159"><text:span text:style-name="T160">x_min, x_max, y_min, y_max, step, offset</text:span><text:span text:style-name="T161"> — параметры отображения</text:span></text:p>
            </text:list-item>
            <text:list-item>
              <text:p text:style-name="P162"><text:span text:style-name="T163">taylor</text:span><text:span text:style-name="T164"> — объект класса TaylorSeries</text:span></text:p>
            </text:list-item>
            <text:list-item>
              <text:p text:style-name="P165"><text:span text:style-name="T166">analytic</text:span><text:span text:style-name="T167"> — объект класса AnalyticFunction</text:span></text:p>
            </text:list-item>
            <text:list-item>
              <text:p text:style-name="P168"><text:span text:style-name="T169">graph_canvas</text:span><text:span text:style-name="T170"> — объект класса GraphCanvas</text:span></text:p>
            </text:list-item>
            <text:list-item>
              <text:p text:style-name="P171"><text:span text:style-name="T172">entries</text:span><text:span text:style-name="T173"> — словарь с элементами ввода</text:span></text:p>
            </text:list-item>
          </text:list>
        </text:list-item>
        <text:list-item>
          <text:p text:style-name="P174"><text:span text:style-name="T175">Методы:</text:span></text:p>
          <text:list text:continue-numbering="true">
            <text:list-item>
              <text:p text:style-name="P176"><text:span text:style-name="T177">create_widgets()</text:span><text:span text:style-name="T178"> — создание элементов управления</text:span></text:p>
            </text:list-item>
            <text:list-item>
              <text:p text:style-name="P179"><text:span text:style-name="T180">create_math_objects()</text:span><text:span text:style-name="T181"> — инициализация математических объектов</text:span></text:p>
            </text:list-item>
            <text:list-item>
              <text:p text:style-name="P182"><text:span text:style-name="T183">get_data()</text:span><text:span text:style-name="T184"> — получение и проверка данных из полей ввода</text:span></text:p>
            </text:list-item>
            <text:list-item>
              <text:p text:style-name="P185"><text:span text:style-name="T186">draw_all()</text:span><text:span text:style-name="T187"> — перерисовка всех графиков</text:span></text:p>
            </text:list-item>
            <text:list-item>
              <text:p text:style-name="P188"><text:span text:style-name="T189">on_draw(event)</text:span><text:span text:style-name="T190"> — обработчик нажатия кнопки "Рисовать"</text:span></text:p>
            </text:list-item>
            <text:list-item>
              <text:p text:style-name="P191"><text:span text:style-name="T192">show_coordinates(event)</text:span><text:span text:style-name="T193"> —<text:s/></text:span><text:span text:style-name="T194">отображение</text:span><text:span text:style-name="T195"><text:s/></text:span><text:span text:style-name="T196">координат</text:span><text:span text:style-name="T197"><text:s/></text:span><text:span text:style-name="T198">курсора</text:span></text:p>
            </text:list-item>
            <text:list-item>
              <text:p text:style-name="P199"><text:span text:style-name="T200">on_closing()</text:span><text:span text:style-name="T201"> — корректное завершение работы приложения</text:span></text:p>
            </text:list-item>
          </text:list>
        </text:list-item>
      </text:list>
      <text:p text:style-name="P202"/>
      <text:h text:style-name="P203" text:outline-level="1">Описание работы программы:</text:h>
      <text:p text:style-name="P204">При запуске программы открывается графическое окно с холстом для отображения графиков и панелью управления.</text:p>
      <text:soft-page-break/>
      <text:p text:style-name="P205"><text:span text:style-name="T206">Интерфейс пользователя включает:</text:span></text:p>
      <text:list text:style-name="LFO12" text:continue-numbering="true">
        <text:list-item>
          <text:p text:style-name="P207">Поля для отображения координат курсора (X, Y)</text:p>
        </text:list-item>
        <text:list-item>
          <text:p text:style-name="P208">Поля для настройки границ отображения (Xmin, Xmax, Ymin, Ymax)</text:p>
        </text:list-item>
        <text:list-item>
          <text:p text:style-name="P209">Поле для задания шага меток на осях</text:p>
        </text:list-item>
        <text:list-item>
          <text:p text:style-name="P210">Поле для ввода параметра смещения b</text:p>
        </text:list-item>
        <text:list-item>
          <text:p text:style-name="P211">Кнопки управления: "Рисовать" и "Выход"</text:p>
        </text:list-item>
      </text:list>
      <text:p text:style-name="P212"><text:span text:style-name="T213">Основные функциональные возможности:</text:span></text:p>
      <text:list text:style-name="LFO13" text:continue-numbering="true">
        <text:list-item>
          <text:p text:style-name="P214"><text:span text:style-name="T215">Построение двух графиков:</text:span></text:p>
          <text:list text:continue-numbering="true">
            <text:list-item>
              <text:p text:style-name="P216">Синим цветом отображается график, построенный с использованием ряда Тейлора для функции e^x</text:p>
            </text:list-item>
            <text:list-item>
              <text:p text:style-name="P217">Красным цветом отображается аналитическая функция e^x + b</text:p>
            </text:list-item>
          </text:list>
        </text:list-item>
        <text:list-item>
          <text:p text:style-name="P218"><text:span text:style-name="T219">Настройка параметров отображения:</text:span></text:p>
          <text:list text:continue-numbering="true">
            <text:list-item>
              <text:p text:style-name="P220">Пользователь может изменять границы отображения по осям X и Y</text:p>
            </text:list-item>
            <text:list-item>
              <text:p text:style-name="P221">Регулировка шага между делениями на координатных осях</text:p>
            </text:list-item>
            <text:list-item>
              <text:p text:style-name="P222">Изменение параметра смещения b для аналитической функции</text:p>
            </text:list-item>
          </text:list>
        </text:list-item>
        <text:list-item>
          <text:p text:style-name="P223"><text:span text:style-name="T224">Интерактивное взаимодействие:</text:span></text:p>
          <text:list text:continue-numbering="true">
            <text:list-item>
              <text:p text:style-name="P225">При нажатии на график отображаются координаты точки</text:p>
            </text:list-item>
            <text:list-item>
              <text:p text:style-name="P226">Проводятся пунктирные линии от точки до осей для наглядности</text:p>
            </text:list-item>
            <text:list-item>
              <text:p text:style-name="P227">Координаты автоматически отображаются в соответствующих полях ввода</text:p>
            </text:list-item>
          </text:list>
        </text:list-item>
        <text:list-item>
          <text:p text:style-name="P228"><text:span text:style-name="T229">Визуальное оформление:</text:span></text:p>
          <text:list text:continue-numbering="true">
            <text:list-item>
              <text:p text:style-name="P230">Зеленым цветом выделены координатные оси с разметкой</text:p>
            </text:list-item>
            <text:list-item>
              <text:p text:style-name="P231">Графики построены с плавными линиями</text:p>
            </text:list-item>
            <text:list-item>
              <text:p text:style-name="P232">Добавлены легенды для идентификации функций</text:p>
            </text:list-item>
          </text:list>
        </text:list-item>
      </text:list>
      <text:p text:style-name="P233"><text:span text:style-name="T234">Преимущества объектно-ориентированной реализации:</text:span></text:p>
      <text:list text:style-name="LFO14" text:continue-numbering="true">
        <text:list-item>
          <text:p text:style-name="P235"><text:span text:style-name="T236">Модульность:</text:span><text:span text:style-name="T237"> Каждый класс отвечает за свою функциональность</text:span></text:p>
        </text:list-item>
        <text:list-item>
          <text:p text:style-name="P238"><text:span text:style-name="T239">Расширяемость:</text:span><text:span text:style-name="T240"> Легко добавить новые функции или методы отображения</text:span></text:p>
        </text:list-item>
        <text:list-item>
          <text:p text:style-name="P241"><text:span text:style-name="T242">Переиспользуемость:</text:span><text:span text:style-name="T243"> Классы могут быть использованы в других проектах</text:span></text:p>
        </text:list-item>
        <text:list-item>
          <text:p text:style-name="P244"><text:span text:style-name="T245">Удобство сопровождения:</text:span><text:span text:style-name="T246"> Четкая структура облегчает отладку и модификацию</text:span></text:p>
        </text:list-item>
      </text:list>
      <text:p text:style-name="Standard"><draw:frame draw:z-index="3" draw:id="id0" draw:style-name="a1" draw:name="Врезка2" text:anchor-type="paragraph" svg:x="0.7874in" svg:y="3.96378in" svg:width="5.95in" svg:height="4.18333in" style:rel-width="scale" style:rel-height="scale"><draw:text-box><text:p text:style-name="Рис.">Рис. 2: Вторая программа</text:p></draw:text-box><svg:title/><svg:desc/></draw:frame></text:p>
      <text:h text:style-name="Заголовок1" text:outline-level="1">Результат работы программы:</text:h>
      <text:p text:style-name="Обычный">В результате выполнения программы создается графическое приложение, позволяющее:</text:p>
      <text:list text:style-name="LFO15" text:continue-numbering="true">
        <text:list-item>
          <text:p text:style-name="P247">Отображать одновременно два графика функций</text:p>
        </text:list-item>
        <text:list-item>
          <text:p text:style-name="P248">Сравнивать точность ряда Тейлора с аналитической функцией</text:p>
        </text:list-item>
        <text:list-item>
          <text:p text:style-name="P249">Интерактивно изменять параметры отображения</text:p>
        </text:list-item>
        <text:list-item>
          <text:p text:style-name="P250">Получать координаты любой точки графика одним кликом</text:p>
        </text:list-item>
      </text:list>
      <text:p text:style-name="Standard">Программа демонстрирует преимущества использования библиотеки tkinter для создания графических интерфейсов и объектно-ориентированного подхода для организации кода.</text:p>
      <text:p text:style-name="Standard"/>
      <text:soft-page-break/>
      <text:p text:style-name="Standard"><draw:frame draw:z-index="251659264" draw:id="id1" draw:style-name="a2" draw:name="Надпись 2" text:anchor-type="paragraph" svg:x="4.29028in" svg:y="1.51676in" svg:width="2.58194in" svg:height="1.53611in" style:rel-width="scale" style:rel-height="scale"><draw:text-box><text:p text:style-name="P251">Рис. 1 (результат выполнения 7-й лабораторной работы)</text:p></draw:text-box><svg:title/><svg:desc/></draw:frame><draw:frame draw:style-name="a3" draw:name="Рисунок 1" text:anchor-type="as-char" svg:x="0in" svg:y="0in" svg:width="4.06219in" svg:height="2.0026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251661312" draw:id="id2" draw:style-name="a4" draw:name="Надпись 2" text:anchor-type="paragraph" svg:x="4.17699in" svg:y="1.86806in" svg:width="2.58194in" svg:height="1.53611in" style:rel-width="scale" style:rel-height="scale"><draw:text-box><text:p text:style-name="P252">А</text:p></draw:text-box><svg:title/><svg:desc/></draw:frame><draw:frame draw:z-index="251663360" draw:id="id3" draw:style-name="a5" draw:name="Надпись 2" text:anchor-type="paragraph" svg:x="4.17391in" svg:y="3.78835in" svg:width="2.58194in" svg:height="1.53611in" style:rel-width="scale" style:rel-height="scale"><draw:text-box><text:p text:style-name="P253">Б</text:p></draw:text-box><svg:title/><svg:desc/></draw:frame><draw:frame draw:style-name="a6" draw:name="Рисунок 1" text:anchor-type="as-char" svg:x="0in" svg:y="0in" svg:width="4.05694in" svg:height="2.44092in" style:rel-width="scale" style:rel-height="scale"><draw:image xlink:href="media/image3.png" xlink:type="simple" xlink:show="embed" xlink:actuate="onLoad"/><svg:title/><svg:desc/></draw:frame></text:p>
      <text:p text:style-name="Standard"><draw:frame draw:z-index="251665408" draw:id="id4" draw:style-name="a7" draw:name="Надпись 2" text:anchor-type="paragraph" svg:x="4.17352in" svg:y="1.81458in" svg:width="2.58194in" svg:height="1.53611in" style:rel-width="scale" style:rel-height="scale"><draw:text-box><text:p text:style-name="P254">Рис. 2 (А – результат 8-й лабораторной работы; Б – результат 8-й лабораторной работы со смещением<text:s/>5)</text:p></draw:text-box><svg:title/><svg:desc/></draw:frame><draw:frame draw:style-name="a8" draw:name="Рисунок 1" text:anchor-type="as-char" svg:x="0in" svg:y="0in" svg:width="4.06315in" svg:height="2.4359in" style:rel-width="scale" style:rel-height="scale"><draw:image xlink:href="media/image4.png" xlink:type="simple" xlink:show="embed" xlink:actuate="onLoad"/><svg:title/><svg:desc/></draw:frame></text:p>
      <text:h text:style-name="Заголовок1" text:outline-level="1"><text:bookmark-start text:name="__RefHeading___Toc1332_2508171050"/></text:h>
      <text:h text:style-name="P255" text:outline-level="1"/>
      <text:h text:style-name="P256" text:outline-level="1">Список использованной литературы и материалов<text:bookmark-end text:name="__RefHeading___Toc1332_2508171050"/></text:h>
      <text:p text:style-name="Standard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Standard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Standard"><text:s text:c="4"/>3. Лутц М. Изучаем Python. – 5-е изд. – СПб.: Диалектика, 2019. – 1460 с.: ил.</text:p>
      <text:soft-page-break/>
      <text:p text:style-name="Standard"><text:s text:c="4"/><text:span text:style-name="T257">4. Welcome to python.org. —<text:s/></text:span>Текст<text:span text:style-name="T258"><text:s/>:<text:s/></text:span>электронный<text:span text:style-name="T259"><text:s/>// The official home of the Python Programming Language : [</text:span>сайт<text:span text:style-name="T260">]. — URL: https://www.python.org/ (</text:span>дата<text:span text:style-name="T261"><text:s/></text:span>обращения<text:span text:style-name="T262">: 14.09.2025).</text:span></text:p>
      <text:p text:style-name="Standard"><text:span text:style-name="T263"><text:s text:c="4"/></text:span>5. Git. — Текст : электронный // Git : [сайт]. — URL: https://git-scm.com/ (дата обращения: 14.09.2025).</text:p>
      <text:p text:style-name="Standard"><text:s text:c="4"/>6. GitHub. — Текст : электронный // GitHub : [сайт]. — URL: https://github.com/ (дата обращения: 14.09.2025).</text:p>
      <text:p text:style-name="Standard"><text:s text:c="4"/><text:span text:style-name="T264">7. PyCharm: The only Python IDE you need. —<text:s/></text:span>Текст<text:span text:style-name="T265"><text:s/>:<text:s/></text:span>электронный<text:span text:style-name="T266"><text:s/>// JetBrains: Essential tools for software developers and teams : [</text:span>сайт<text:span text:style-name="T267">]. — URL: https://www.jetbrains.com/pycharm/ (</text:span>дата<text:span text:style-name="T268"><text:s/></text:span>обращения<text:span text:style-name="T269">: 14.09.2025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13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<text:span text:style-name="T13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6-06-23T17:51:00Z</meta:creation-date>
    <dc:date>2026-06-23T17:51:00Z</dc:date>
    <meta:template xlink:href="Normal" xlink:type="simple"/>
    <meta:editing-cycles>2</meta:editing-cycles>
    <meta:editing-duration>PT240S</meta:editing-duration>
    <meta:document-statistic meta:page-count="7" meta:paragraph-count="14" meta:word-count="1104" meta:character-count="7389" meta:row-count="52" meta:non-whitespace-character-count="6299"/>
  </office:meta>
</office:document-meta>
</file>