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F40000024E4C6B324E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Table2" style:family="table" style:master-page-name="MPF0">
      <style:table-properties style:width="17.978cm" style:page-number="auto" table:align="right"/>
    </style:style>
    <style:style style:name="Table2.A" style:family="table-column">
      <style:table-column-properties style:column-width="17.978cm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3" style:family="table">
      <style:table-properties style:width="18cm" fo:margin-left="0cm" table:align="left"/>
    </style:style>
    <style:style style:name="Table3.A" style:family="table-column">
      <style:table-column-properties style:column-width="2.406cm"/>
    </style:style>
    <style:style style:name="Table3.B" style:family="table-column">
      <style:table-column-properties style:column-width="5.579cm"/>
    </style:style>
    <style:style style:name="Table3.C" style:family="table-column">
      <style:table-column-properties style:column-width="2.3cm"/>
    </style:style>
    <style:style style:name="Table3.D" style:family="table-column">
      <style:table-column-properties style:column-width="3.713cm"/>
    </style:style>
    <style:style style:name="Table3.E" style:family="table-column">
      <style:table-column-properties style:column-width="0.409cm"/>
    </style:style>
    <style:style style:name="Table3.F" style:family="table-column">
      <style:table-column-properties style:column-width="3.593cm"/>
    </style:style>
    <style:style style:name="Table3.A1" style:family="table-cell">
      <style:table-cell-properties fo:padding="0cm" fo:border="none" style:writing-mode="lr-tb"/>
    </style:style>
    <style:style style:name="Table3.B1" style:family="table-cell">
      <style:table-cell-properties fo:padding="0.097cm" fo:border-left="none" fo:border-right="none" fo:border-top="none" fo:border-bottom="0.5pt solid #000000" style:writing-mode="lr-tb"/>
    </style:style>
    <style:style style:name="Table3.2" style:family="table-row">
      <style:table-row-properties style:min-row-height="0.226cm" style:use-optimal-row-height="false"/>
    </style:style>
    <style:style style:name="P1" style:family="paragraph" style:parent-style-name="Table_20_Contents">
      <style:paragraph-properties fo:break-before="page"/>
      <style:text-properties fo:color="#111111" loext:opacity="100%"/>
    </style:style>
    <style:style style:name="P2" style:family="paragraph" style:parent-style-name="Table_20_Contents">
      <style:text-properties fo:color="#111111" loext:opacity="100%"/>
    </style:style>
    <style:style style:name="P3" style:family="paragraph" style:parent-style-name="Standard">
      <style:text-properties fo:color="#111111" loext:opacity="100%"/>
    </style:style>
    <style:style style:name="P4" style:family="paragraph" style:parent-style-name="Text_20_body">
      <style:text-properties fo:color="#111111" loext:opacity="100%" fo:language="en" fo:country="US"/>
    </style:style>
    <style:style style:name="P5" style:family="paragraph" style:parent-style-name="Содержимое_20_таблицы_20_по_20_центру">
      <style:text-properties fo:color="#111111" loext:opacity="100%" officeooo:rsid="00139072" officeooo:paragraph-rsid="00139072"/>
    </style:style>
    <style:style style:name="P6" style:family="paragraph" style:parent-style-name="Примечание">
      <style:text-properties fo:color="#111111" loext:opacity="100%"/>
    </style:style>
    <style:style style:name="P7" style:family="paragraph" style:parent-style-name="Содержимое_20_таблицы_20_по_20_центру">
      <style:text-properties fo:color="#111111" loext:opacity="100%"/>
    </style:style>
    <style:style style:name="P8" style:family="paragraph" style:parent-style-name="Standard">
      <style:text-properties fo:color="#111111" loext:opacity="100%" fo:language="en" fo:country="US"/>
    </style:style>
    <style:style style:name="P9" style:family="paragraph" style:parent-style-name="Contents_20_Heading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fo:language="en" fo:country="US"/>
    </style:style>
    <style:style style:name="T1" style:family="text">
      <style:text-properties fo:color="#111111" loext:opacity="100%"/>
    </style:style>
    <style:style style:name="T2" style:family="text">
      <style:text-properties fo:color="#111111" loext:opacity="100%" fo:language="en" fo:country="US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>ФАКУЛЬТЕТ</text:p>
          </table:table-cell>
        </table:table-row>
        <table:table-row>
          <table:table-cell table:style-name="Table2.A1" office:value-type="string">
            <text:p text:style-name="P2">КАФЕДРА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<text:span text:style-name="Основной_20_шрифт_20_абзаца"><text:span text:style-name="T1">ОТЧЕТ<text:line-break/>о лабораторной работе № </text:span></text:span><text:span text:style-name="Основной_20_шрифт_20_абзаца"><text:span text:style-name="T2">16</text:span></text:span></text:p>
      <text:p text:style-name="P3"/>
      <text:p text:style-name="Подзаголовок"><text:span text:style-name="Основной_20_шрифт_20_абзаца"><text:span text:style-name="T2">«</text:span></text:span><text:span text:style-name="Основной_20_шрифт_20_абзаца"><text:span text:style-name="T1">Регулярные выражения в </text:span></text:span><text:span text:style-name="Основной_20_шрифт_20_абзаца"><text:span text:style-name="T2">Python»</text:span></text:span></text:p>
      <text:p text:style-name="P4"/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Выполнил</text:p>
          </table:table-cell>
          <table:table-cell table:style-name="Table3.B1" office:value-type="string">
            <text:p text:style-name="Table_20_Contents"><text:span text:style-name="Основной_20_шрифт_20_абзаца"><text:span text:style-name="T1">студент группы ИУ10-</text:span></text:span><text:span text:style-name="Основной_20_шрифт_20_абзаца"><text:span text:style-name="T2">4</text:span></text:span><text:span text:style-name="Основной_20_шрифт_20_абзаца"><text:span text:style-name="T1">9</text:span></text:span></text:p>
          </table:table-cell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5">С.А. Михалев</text:p>
          </table:table-cell>
        </table:table-row>
        <table:table-row table:style-name="Table3.2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(группа)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(подпись)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(И.О. Фамилия)</text:p>
          </table:table-cell>
        </table:table-row>
        <table:table-row>
          <table:table-cell table:style-name="Table3.A1" office:value-type="string">
            <text:p text:style-name="P2">Проверил</text:p>
          </table:table-cell>
          <table:table-cell table:style-name="Table3.B1" office:value-type="string">
            <text:p text:style-name="P2">ассистент кафедры ИУ10</text:p>
          </table:table-cell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7">М.А. Наткин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(подпись)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(И.О. Фамилия)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soft-page-break/>Содержание</text:p>
          <text:p text:style-name="P10"><text:a xlink:type="simple" xlink:href="#__RefHeading___Toc925_2786680863" office:target-frame-name="_top" xlink:show="replace" text:style-name="Internet_20_link" text:visited-style-name="Visited_20_Internet_20_Link">Постановка задачи<text:tab/>3</text:a></text:p>
          <text:p text:style-name="P10"><text:a xlink:type="simple" xlink:href="#__RefHeading___Toc927_2786680863" office:target-frame-name="_top" xlink:show="replace" text:style-name="Internet_20_link" text:visited-style-name="Visited_20_Internet_20_Link">Теоретическая часть<text:tab/>3</text:a></text:p>
          <text:p text:style-name="P10"><text:a xlink:type="simple" xlink:href="#__RefHeading___Toc929_2786680863" office:target-frame-name="_top" xlink:show="replace" text:style-name="Internet_20_link" text:visited-style-name="Visited_20_Internet_20_Link">Пример входного файла (input.txt)<text:tab/>4</text:a></text:p>
          <text:p text:style-name="P10"><text:a xlink:type="simple" xlink:href="#__RefHeading___Toc931_2786680863" office:target-frame-name="_top" xlink:show="replace" text:style-name="Internet_20_link" text:visited-style-name="Visited_20_Internet_20_Link">Листинг программы<text:tab/>4</text:a></text:p>
          <text:p text:style-name="P10"><text:a xlink:type="simple" xlink:href="#__RefHeading___Toc933_2786680863" office:target-frame-name="_top" xlink:show="replace" text:style-name="Internet_20_link" text:visited-style-name="Visited_20_Internet_20_Link"><text:s/>Список использованной литературы и материалов<text:tab/>4</text:a></text:p>
        </text:index-body>
      </text:table-of-content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Заголовок_20_1" text:outline-level="1"><text:bookmark-start text:name="__RefHeading___Toc925_2786680863"/>Постановка задачи<text:bookmark-end text:name="__RefHeading___Toc925_2786680863"/></text:h>
      <text:p text:style-name="Text_20_body"/>
      <text:p text:style-name="Text_20_body"><text:soft-page-break/>1. Написать программу на языке программирования Python, которая с помощью регулярных выражений извлекает из файла input.txt следующие данные:</text:p>
      <text:p text:style-name="Text_20_body"><text:s text:c="3"/>- IP-адреса;</text:p>
      <text:p text:style-name="Text_20_body"><text:s text:c="3"/>- коды ошибок (коды HTTP-ответов);</text:p>
      <text:p text:style-name="Text_20_body"><text:s text:c="3"/>- метод и URL.</text:p>
      <text:p text:style-name="Text_20_body">2. Оформить отчет.</text:p>
      <text:h text:style-name="Заголовок_20_1" text:outline-level="1"><text:bookmark-start text:name="__RefHeading___Toc927_2786680863"/>Теоретическая часть<text:bookmark-end text:name="__RefHeading___Toc927_2786680863"/></text:h>
      <text:p text:style-name="Text_20_body">Регулярные выражения (Regular Expressions, regex) — это мощный инструмент для поиска, извлечения и замены текста по заданным шаблонам. В Python регулярные выражения реализованы в модуле re.</text:p>
      <text:p text:style-name="Text_20_body">Основные метасимволы и конструкции:</text:p>
      <text:p text:style-name="Text_20_body">- \d — любая цифра (0-9)</text:p>
      <text:p text:style-name="Text_20_body">- \w — любая буква, цифра или знак подчеркивания</text:p>
      <text:p text:style-name="Text_20_body">- \s — любой пробельный символ</text:p>
      <text:p text:style-name="Text_20_body">- . — любой символ, кроме перевода строки</text:p>
      <text:p text:style-name="Text_20_body">- * — предыдущий символ повторяется 0 или более раз</text:p>
      <text:p text:style-name="Text_20_body">- + — предыдущий символ повторяется 1 или более раз</text:p>
      <text:p text:style-name="Text_20_body">- ? — предыдущий символ повторяется 0 или 1 раз</text:p>
      <text:p text:style-name="Text_20_body">- {n} — предыдущий символ повторяется ровно n раз</text:p>
      <text:p text:style-name="Text_20_body">- {n,m} — предыдущий символ повторяется от n до m раз</text:p>
      <text:p text:style-name="Text_20_body">- [] — набор допустимых символов</text:p>
      <text:p text:style-name="Text_20_body">- () — группа для извлечения подстроки</text:p>
      <text:p text:style-name="Text_20_body">- | — логическое ИЛИ</text:p>
      <text:p text:style-name="Text_20_body"/>
      <text:p text:style-name="Text_20_body">Основные функции модуля re:</text:p>
      <text:p text:style-name="Text_20_body"><text:span text:style-name="Основной_20_шрифт_20_абзаца"><text:span text:style-name="T3">- re.search(pattern, string) — </text:span></text:span>ищет<text:span text:style-name="Основной_20_шрифт_20_абзаца"><text:span text:style-name="T3"> </text:span></text:span>первое<text:span text:style-name="Основной_20_шрифт_20_абзаца"><text:span text:style-name="T3"> </text:span></text:span>совпадение</text:p>
      <text:p text:style-name="Text_20_body">- re.findall(pattern, string) — возвращает все совпадения в виде списка</text:p>
      <text:p text:style-name="Text_20_body">- re.finditer(pattern, string) — возвращает итератор по всем совпадениям</text:p>
      <text:p text:style-name="Text_20_body">- re.sub(pattern, repl, string) — заменяет совпадения</text:p>
      <text:p text:style-name="Text_20_body"><text:soft-page-break/>- re.compile(pattern) — компилирует регулярное выражение для многократного использования</text:p>
      <text:h text:style-name="Заголовок_20_1" text:outline-level="1"><text:bookmark-start text:name="__RefHeading___Toc929_2786680863"/>Пример входного файла (input.txt)<text:bookmark-end text:name="__RefHeading___Toc929_2786680863"/></text:h>
      <text:p text:style-name="P11">192.168.1.10 - - [24/Nov/2026:20:56:01 +0300] "GET /index.html HTTP/1.1" 200 1024</text:p>
      <text:p text:style-name="P11">10.0.0.5 - - [30/Avg/2026:10:00:02 +0300] "POST /login.php HTTP/1.1" 401 512</text:p>
      <text:p text:style-name="P11">192.168.1.10 - - [18/Apr/2026:10:00:05 +0300] "GET /images/logo.png HTTP/1.1" 200 4500</text:p>
      <text:p text:style-name="P11">203.0.113.45 - - [06/Mar/2026:09:00:10 +0300] "GET /admin/dashboard HTTP/1.1" 403 2048</text:p>
      <text:p text:style-name="P11">172.16.0.1 - - [04/Dec/2026:10:00:15 +0300] "GET /api/data HTTP/1.1" 500 120</text:p>
      <text:h text:style-name="Заголовок_20_1" text:outline-level="1"><text:bookmark-start text:name="__RefHeading___Toc931_2786680863"/>Листинг программы<text:bookmark-end text:name="__RefHeading___Toc931_2786680863"/></text:h>
      <text:p text:style-name="Text_20_body">Исходный код программы размещён в репозитории GitHub:</text:p>
      <text:p text:style-name="Text_20_body">https://github.com/PUM84/BMSTU_Python_MihalevSA</text:p>
      <text:h text:style-name="Заголовок_20_1" text:outline-level="1"><text:bookmark-start text:name="__RefHeading___Toc933_2786680863"/>Список использованной литературы и материалов<text:bookmark-end text:name="__RefHeading___Toc933_2786680863"/></text:h>
      <text:p text:style-name="Text_20_body"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Text_20_body">2. Брюс М. Ван Хорн II, Куан Нгуен. PyCharm: профессиональная работа на Python / пер. с англ. И.Л. Люско. – М.:ДМК Пресс, 2024. – 618 с.: ил.</text:p>
      <text:p text:style-name="Text_20_body">3. Welcome to python.org. — Текст : электронный // The official home of the Python Programming Language : [сайт]. — URL: https://www.python.org/ (дата обращения: 14.09.2025).</text:p>
      <text:p text:style-name="Text_20_body">4. Git. — Текст : электронный // Git : [сайт]. — URL: https://git-scm.com/ (дата обращения: 14.09.2025).</text:p>
      <text:p text:style-name="Text_20_body">5. GitHub. — Текст : электронный // GitHub : [сайт]. — URL: https://github.com/ (дата обращения: 14.09.2025).</text:p>
      <text:p text:style-name="Text_20_body"><text:span text:style-name="Основной_20_шрифт_20_абзаца"><text:span text:style-name="T3">6. PyCharm: The only Python IDE you need. — </text:span></text:span>Текст<text:span text:style-name="Основной_20_шрифт_20_абзаца"><text:span text:style-name="T3"> : </text:span></text:span>электронный<text:span text:style-name="Основной_20_шрифт_20_абзаца"><text:span text:style-name="T3"> // JetBrains: Essential tools for software developers and teams : [</text:span></text:span>сайт<text:span text:style-name="Основной_20_шрифт_20_абзаца"><text:span text:style-name="T3">]. — URL: https://www.jetbrains.com/pycharm/ (</text:span></text:span>дата<text:span text:style-name="Основной_20_шрифт_20_абзаца"><text:span text:style-name="T3"> </text:span></text:span>обращения<text:span text:style-name="Основной_20_шрифт_20_абзаца"><text:span text:style-name="T3">: 14.09.2025).</text:span></text:span></text:p>
      <text:p text:style-name="Text_20_body">7. Документация Python по модулю re. — Текст : электронный // Python.org : [сайт]. — URL: https://docs.python.org/3/library/re.html (дата обращения: 29.05.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fo:background-color="transparent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text-align="center" style:justify-single-word="false"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size="14pt" fo:font-weight="bold" style:font-name-asian="NSimSun" style:font-family-asian="NSimSun" style:font-family-generic-asian="modern" style:font-pitch-asian="fixed" style:font-size-asian="14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6pt" style:font-name-asian="Microsoft YaHei" style:font-family-asian="'Microsoft YaHei'" style:font-family-generic-asian="swiss" style:font-pitch-asian="variable" style:font-size-asian="16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_20_по_20_центру" style:display-name="Нижний колонтитул по центру" style:family="paragraph" style:parent-style-name="Нижний_20_колонтитул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Примечание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loext:hyphenation-keep-line="false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Указатель" style:class="index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 loext:hyphenation-keep-line="false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.999cm" fo:margin-left="0cm" table:align="left"/>
    </style:style>
    <style:style style:name="Table1.A" style:family="table-column">
      <style:table-column-properties style:column-width="4.399cm"/>
    </style:style>
    <style:style style:name="Table1.B" style:family="table-column">
      <style:table-column-properties style:column-width="13.6cm"/>
    </style:style>
    <style:style style:name="Table1.1" style:family="table-row">
      <style:table-row-properties style:min-row-height="5.202cm" style:use-optimal-row-height="false"/>
    </style:style>
    <style:style style:name="Table1.A1" style:family="table-cell">
      <style:table-cell-properties fo:padding-left="0.018cm" fo:padding-right="0.018cm" fo:padding-top="0cm" fo:padding-bottom="0cm" fo:border="none" style:writing-mode="lr-tb"/>
    </style:style>
    <style:style style:name="MT1" style:family="text">
      <style:text-properties fo:language="en" fo:country="US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Header"/>
      </style:header>
      <style:header-first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Рисунок 3 Копия 1 Копия 1 Копия 1" text:anchor-type="as-char" svg:y="0cm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Table1.A1" office:value-type="string">
              <text:p text:style-name="Штамп_20_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 text:style-name="Footer"/>
      </style:footer>
      <style:footer-first>
        <text:p text:style-name="Нижний_20_колонтитул_20_по_20_центру">МОСКВА<text:line-break/>202<text:span text:style-name="Основной_20_шрифт_20_абзаца"><text:span text:style-name="MT1">6</text:span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X86_64 LibreOffice_project/54047653041915e595ad4e45cccea684809c77b5</meta:generator>
    <meta:creation-date>2026-05-29T19:54:00Z</meta:creation-date>
    <dc:date>2026-06-23T15:29:10.585743000</dc:date>
    <meta:editing-cycles>3</meta:editing-cycles>
    <meta:editing-duration>PT11M57S</meta:editing-duration>
    <meta:document-statistic meta:table-count="3" meta:image-count="1" meta:object-count="0" meta:page-count="4" meta:paragraph-count="68" meta:word-count="489" meta:character-count="3681" meta:non-whitespace-character-count="3216"/>
    <meta:template xlink:type="simple" xlink:actuate="onRequest" xlink:title="" xlink:href="Normal.dotm"/>
  </office:meta>
</office:document-meta>
</file>