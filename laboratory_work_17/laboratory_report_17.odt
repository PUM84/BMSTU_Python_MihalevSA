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le2" style:family="table" style:master-page-name="MPF0">
      <style:table-properties style:width="17.978cm" style:page-number="auto" table:align="right"/>
    </style:style>
    <style:style style:name="Table2.A" style:family="table-column">
      <style:table-column-properties style:column-width="4.397cm"/>
    </style:style>
    <style:style style:name="Table2.B" style:family="table-column">
      <style:table-column-properties style:column-width="13.58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padding="0.097cm" fo:border-left="none" fo:border-right="none" fo:border-top="none" fo:border-bottom="0.5pt solid #000000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Содержимое_20_таблицы_20_по_20_центру">
      <style:text-properties officeooo:rsid="000682f2" officeooo:paragraph-rsid="000682f2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language="en" fo:country="US" fo:font-style="italic" style:font-style-asian="italic" style:font-style-complex="italic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ФАКУЛЬТЕТ</text:p>
          </table:table-cell>
          <table:table-cell table:style-name="Table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Table2.A1" office:value-type="string">
            <text:p text:style-name="Table_20_Contents">КАФЕДРА</text:p>
          </table:table-cell>
          <table:table-cell table:style-name="Table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 <text:span text:style-name="Основной_20_шрифт_20_абзаца"><text:span text:style-name="T1">1</text:span></text:span>7</text:p>
      <text:p text:style-name="Standard"/>
      <text:p text:style-name="Подзаголовок">«Базовое администрирование <text:span text:style-name="Основной_20_шрифт_20_абзаца"><text:span text:style-name="T1">Linux</text:span></text:span> с использованием <text:span text:style-name="Основной_20_шрифт_20_абзаца"><text:span text:style-name="T1">Python</text:span></text:span>»</text:p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Contents">Выполнил</text:p>
          </table:table-cell>
          <table:table-cell table:style-name="Table3.B1" office:value-type="string">
            <text:p text:style-name="Table_20_Contents">студент группы ИУ10-<text:span text:style-name="Основной_20_шрифт_20_абзаца"><text:span text:style-name="T1">4</text:span></text:span>9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2">С.А. Михалев</text:p>
          </table:table-cell>
        </table:table-row>
        <table:table-row table:style-name="Table3.2"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группа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  <table:table-row>
          <table:table-cell table:style-name="Table3.A1" office:value-type="string">
            <text:p text:style-name="Table_20_Contents">Проверил</text:p>
          </table:table-cell>
          <table:table-cell table:style-name="Table3.B1" office:value-type="string">
            <text:p text:style-name="Table_20_Contents">ассистент кафедры ИУ10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Содержание</text:p>
          <text:p text:style-name="P5"><text:a xlink:type="simple" xlink:href="#__RefHeading___Toc659_2355785664" office:target-frame-name="_top" xlink:show="replace" text:style-name="Internet_20_link" text:visited-style-name="Visited_20_Internet_20_Link">Теоретическая часть<text:tab/>3</text:a></text:p>
          <text:p text:style-name="P6"><text:a xlink:type="simple" xlink:href="#__RefHeading___Toc661_2355785664" office:target-frame-name="_top" xlink:show="replace" text:style-name="Internet_20_link" text:visited-style-name="Visited_20_Internet_20_Link"><text:soft-page-break/>Управление пакетами Python с помощью pip3<text:tab/>3</text:a></text:p>
          <text:p text:style-name="P6"><text:a xlink:type="simple" xlink:href="#__RefHeading___Toc663_2355785664" office:target-frame-name="_top" xlink:show="replace" text:style-name="Internet_20_link" text:visited-style-name="Visited_20_Internet_20_Link">Виртуальное окружение (venv)<text:tab/>3</text:a></text:p>
          <text:p text:style-name="P6"><text:a xlink:type="simple" xlink:href="#__RefHeading___Toc665_2355785664" office:target-frame-name="_top" xlink:show="replace" text:style-name="Internet_20_link" text:visited-style-name="Visited_20_Internet_20_Link">Используемые библиотеки<text:tab/>4</text:a></text:p>
          <text:p text:style-name="P5"><text:a xlink:type="simple" xlink:href="#__RefHeading___Toc667_2355785664" office:target-frame-name="_top" xlink:show="replace" text:style-name="Internet_20_link" text:visited-style-name="Visited_20_Internet_20_Link">Постановка задачи<text:tab/>4</text:a></text:p>
          <text:p text:style-name="P5"><text:a xlink:type="simple" xlink:href="#__RefHeading___Toc669_2355785664" office:target-frame-name="_top" xlink:show="replace" text:style-name="Internet_20_link" text:visited-style-name="Visited_20_Internet_20_Link">Листинг программы<text:tab/></text:a>4</text:p>
          <text:p text:style-name="P5"><text:a xlink:type="simple" xlink:href="#__RefHeading___Toc671_2355785664" office:target-frame-name="_top" xlink:show="replace" text:style-name="Internet_20_link" text:visited-style-name="Visited_20_Internet_20_Link">Список использованной литературы и материалов<text:tab/>5</text:a></text:p>
        </text:index-body>
      </text:table-of-content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Заголовок_20_1" text:outline-level="1"><text:bookmark-start text:name="__RefHeading___Toc659_2355785664"/><text:soft-page-break/>Теоретическая часть<text:bookmark-end text:name="__RefHeading___Toc659_2355785664"/></text:h>
      <text:h text:style-name="Заголовок_20_2" text:outline-level="2"><text:bookmark-start text:name="__RefHeading___Toc661_2355785664"/>Управление пакетами Python с помощью pip3<text:bookmark-end text:name="__RefHeading___Toc661_2355785664"/></text:h>
      <text:p text:style-name="Standard"/>
      <text:p text:style-name="Standard"><text:span text:style-name="Основной_20_шрифт_20_абзаца"><text:span text:style-name="T1">pip</text:span></text:span>3 (<text:span text:style-name="Основной_20_шрифт_20_абзаца"><text:span text:style-name="T1">Pip</text:span></text:span> <text:span text:style-name="Основной_20_шрифт_20_абзаца"><text:span text:style-name="T1">Installs</text:span></text:span> <text:span text:style-name="Основной_20_шрифт_20_абзаца"><text:span text:style-name="T1">Packages</text:span></text:span>) — это стандартный менеджер пакетов для <text:span text:style-name="Основной_20_шрифт_20_абзаца"><text:span text:style-name="T1">Python</text:span></text:span> 3, позволяющий устанавливать, обновлять и удалять сторонние библиотеки. В операционной системе <text:span text:style-name="Основной_20_шрифт_20_абзаца"><text:span text:style-name="T1">Astra</text:span></text:span> <text:span text:style-name="Основной_20_шрифт_20_абзаца"><text:span text:style-name="T1">Linux</text:span></text:span> работа с <text:span text:style-name="Основной_20_шрифт_20_абзаца"><text:span text:style-name="T1">pip</text:span></text:span>3 имеет свои особенности, связанные с политикой безопасности.</text:p>
      <text:p text:style-name="Standard"/>
      <text:p text:style-name="Standard">Основные команды <text:span text:style-name="Основной_20_шрифт_20_абзаца"><text:span text:style-name="T1">pip</text:span></text:span>3:</text:p>
      <text:p text:style-name="Standard"/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ip</text:span></text:span><text:span text:style-name="Основной_20_шрифт_20_абзаца"><text:span text:style-name="T2">3 </text:span></text:span><text:span text:style-name="Основной_20_шрифт_20_абзаца"><text:span text:style-name="T3">install</text:span></text:span><text:span text:style-name="Основной_20_шрифт_20_абзаца"><text:span text:style-name="T2"> </text:span></text:span><text:span text:style-name="Основной_20_шрифт_20_абзаца"><text:span text:style-name="T3">package</text:span></text:span><text:span text:style-name="Основной_20_шрифт_20_абзаца"><text:span text:style-name="T2">` | Установка пакета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ip</text:span></text:span><text:span text:style-name="Основной_20_шрифт_20_абзаца"><text:span text:style-name="T2">3 </text:span></text:span><text:span text:style-name="Основной_20_шрифт_20_абзаца"><text:span text:style-name="T3">install</text:span></text:span><text:span text:style-name="Основной_20_шрифт_20_абзаца"><text:span text:style-name="T2"> --</text:span></text:span><text:span text:style-name="Основной_20_шрифт_20_абзаца"><text:span text:style-name="T3">user</text:span></text:span><text:span text:style-name="Основной_20_шрифт_20_абзаца"><text:span text:style-name="T2"> </text:span></text:span><text:span text:style-name="Основной_20_шрифт_20_абзаца"><text:span text:style-name="T3">package</text:span></text:span><text:span text:style-name="Основной_20_шрифт_20_абзаца"><text:span text:style-name="T2">` | Установка для текущего пользователя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ip</text:span></text:span><text:span text:style-name="Основной_20_шрифт_20_абзаца"><text:span text:style-name="T2">3 </text:span></text:span><text:span text:style-name="Основной_20_шрифт_20_абзаца"><text:span text:style-name="T3">uninstall</text:span></text:span><text:span text:style-name="Основной_20_шрифт_20_абзаца"><text:span text:style-name="T2"> </text:span></text:span><text:span text:style-name="Основной_20_шрифт_20_абзаца"><text:span text:style-name="T3">package</text:span></text:span><text:span text:style-name="Основной_20_шрифт_20_абзаца"><text:span text:style-name="T2">` | Удаление пакета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ip</text:span></text:span><text:span text:style-name="Основной_20_шрифт_20_абзаца"><text:span text:style-name="T2">3 </text:span></text:span><text:span text:style-name="Основной_20_шрифт_20_абзаца"><text:span text:style-name="T3">list</text:span></text:span><text:span text:style-name="Основной_20_шрифт_20_абзаца"><text:span text:style-name="T2">` | Список установленных пакетов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ip</text:span></text:span><text:span text:style-name="Основной_20_шрифт_20_абзаца"><text:span text:style-name="T2">3 </text:span></text:span><text:span text:style-name="Основной_20_шрифт_20_абзаца"><text:span text:style-name="T3">show</text:span></text:span><text:span text:style-name="Основной_20_шрифт_20_абзаца"><text:span text:style-name="T2"> </text:span></text:span><text:span text:style-name="Основной_20_шрифт_20_абзаца"><text:span text:style-name="T3">package</text:span></text:span><text:span text:style-name="Основной_20_шрифт_20_абзаца"><text:span text:style-name="T2">` | Информация о пакете |</text:span></text:span></text:p>
      <text:p text:style-name="Standard"/>
      <text:h text:style-name="Заголовок_20_2" text:outline-level="2"><text:bookmark-start text:name="__RefHeading___Toc663_2355785664"/>Виртуальное окружение (venv)<text:bookmark-end text:name="__RefHeading___Toc663_2355785664"/></text:h>
      <text:p text:style-name="Standard"/>
      <text:p text:style-name="Standard">При работе с <text:span text:style-name="Основной_20_шрифт_20_абзаца"><text:span text:style-name="T1">Python</text:span></text:span> в <text:span text:style-name="Основной_20_шрифт_20_абзаца"><text:span text:style-name="T1">Astra</text:span></text:span> <text:span text:style-name="Основной_20_шрифт_20_абзаца"><text:span text:style-name="T1">Linux</text:span></text:span> настоятельно рекомендуется использовать виртуальные окружения. Это позволяет изолировать проекты друг от друга и избежать конфликтов с системными пакетами.</text:p>
      <text:p text:style-name="Standard"/>
      <text:p text:style-name="Standard">Преимущества виртуального окружения:</text:p>
      <text:p text:style-name="Standard">- Независимость версий библиотек для разных проектов</text:p>
      <text:p text:style-name="Standard">- Отсутствие необходимости в правах суперпользователя (<text:span text:style-name="Основной_20_шрифт_20_абзаца"><text:span text:style-name="T1">sudo</text:span></text:span>)</text:p>
      <text:p text:style-name="Standard">- Чистота системного <text:span text:style-name="Основной_20_шрифт_20_абзаца"><text:span text:style-name="T1">Python</text:span></text:span></text:p>
      <text:p text:style-name="Standard">- Лёгкое воспроизведение окружения на других машинах</text:p>
      <text:p text:style-name="Standard"/>
      <text:p text:style-name="Standard">Создание и активация виртуального окружения:</text:p>
      <text:p text:style-name="Standard"/>
      <text:p text:style-name="Standard">```</text:p>
      <text:p text:style-name="Standard"><text:span text:style-name="Основной_20_шрифт_20_абзаца"><text:span text:style-name="T3">bash</text:span></text:span></text:p>
      <text:p text:style-name="Standard"><text:span text:style-name="Основной_20_шрифт_20_абзаца"><text:span text:style-name="T2"># Установка </text:span></text:span><text:span text:style-name="Основной_20_шрифт_20_абзаца"><text:span text:style-name="T3">venv</text:span></text:span><text:span text:style-name="Основной_20_шрифт_20_абзаца"><text:span text:style-name="T2"> (если отсутствует)</text:span></text:span></text:p>
      <text:p text:style-name="Standard"><text:span text:style-name="Основной_20_шрифт_20_абзаца"><text:span text:style-name="T3">sudo</text:span></text:span><text:span text:style-name="Основной_20_шрифт_20_абзаца"><text:span text:style-name="T2"> </text:span></text:span><text:span text:style-name="Основной_20_шрифт_20_абзаца"><text:span text:style-name="T3">apt</text:span></text:span><text:span text:style-name="Основной_20_шрифт_20_абзаца"><text:span text:style-name="T2"> </text:span></text:span><text:span text:style-name="Основной_20_шрифт_20_абзаца"><text:span text:style-name="T3">install</text:span></text:span><text:span text:style-name="Основной_20_шрифт_20_абзаца"><text:span text:style-name="T2"> </text:span></text:span><text:span text:style-name="Основной_20_шрифт_20_абзаца"><text:span text:style-name="T3">python</text:span></text:span><text:span text:style-name="Основной_20_шрифт_20_абзаца"><text:span text:style-name="T2">3-</text:span></text:span><text:span text:style-name="Основной_20_шрифт_20_абзаца"><text:span text:style-name="T3">venv</text:span></text:span></text:p>
      <text:p text:style-name="P7"/>
      <text:p text:style-name="P7"># Создание окружения в папке проекта</text:p>
      <text:p text:style-name="Standard"><text:span text:style-name="Основной_20_шрифт_20_абзаца"><text:span text:style-name="T3">python</text:span></text:span><text:span text:style-name="Основной_20_шрифт_20_абзаца"><text:span text:style-name="T2">3 -</text:span></text:span><text:span text:style-name="Основной_20_шрифт_20_абзаца"><text:span text:style-name="T3">m</text:span></text:span><text:span text:style-name="Основной_20_шрифт_20_абзаца"><text:span text:style-name="T2"> </text:span></text:span><text:span text:style-name="Основной_20_шрифт_20_абзаца"><text:span text:style-name="T3">venv</text:span></text:span><text:span text:style-name="Основной_20_шрифт_20_абзаца"><text:span text:style-name="T2"> </text:span></text:span><text:span text:style-name="Основной_20_шрифт_20_абзаца"><text:span text:style-name="T3">myen</text:span></text:span></text:p>
      <text:p text:style-name="P7"/>
      <text:p text:style-name="P7"># Активация окружения</text:p>
      <text:p text:style-name="P8">source myen/bin/activate</text:p>
      <text:p text:style-name="P8"/>
      <text:p text:style-name="P8"># Выход из окружения</text:p>
      <text:p text:style-name="P8">deactivate</text:p>
      <text:p text:style-name="Standard"><text:soft-page-break/>```</text:p>
      <text:p text:style-name="Standard"/>
      <text:p text:style-name="Standard">Для лабораторной работы №17 необходимо установить следующие библиотеки:</text:p>
      <text:p text:style-name="Standard"/>
      <text:p text:style-name="Standard"><text:span text:style-name="Основной_20_шрифт_20_абзаца"><text:span text:style-name="T3">```</text:span></text:span></text:p>
      <text:p text:style-name="P8">bash</text:p>
      <text:p text:style-name="P8">pip install psutil paramiko schedule</text:p>
      <text:p text:style-name="P7">```</text:p>
      <text:p text:style-name="Standard"/>
      <text:h text:style-name="Заголовок_20_2" text:outline-level="2"><text:bookmark-start text:name="__RefHeading___Toc665_2355785664"/>Используемые библиотеки<text:bookmark-end text:name="__RefHeading___Toc665_2355785664"/></text:h>
      <text:p text:style-name="Standard"/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subprocess</text:span></text:span><text:span text:style-name="Основной_20_шрифт_20_абзаца"><text:span text:style-name="T2">` | Выполнение системных команд (встроенная)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os</text:span></text:span><text:span text:style-name="Основной_20_шрифт_20_абзаца"><text:span text:style-name="T2">` | Работа с операционной системой (встроенная)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shutil</text:span></text:span><text:span text:style-name="Основной_20_шрифт_20_абзаца"><text:span text:style-name="T2">` | Копирование и перемещение файлов (встроенная)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sutil</text:span></text:span><text:span text:style-name="Основной_20_шрифт_20_абзаца"><text:span text:style-name="T2">` | Мониторинг процессов и ресурсов системы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paramiko</text:span></text:span><text:span text:style-name="Основной_20_шрифт_20_абзаца"><text:span text:style-name="T2">` | Удалённое подключение по </text:span></text:span><text:span text:style-name="Основной_20_шрифт_20_абзаца"><text:span text:style-name="T3">SSH</text:span></text:span><text:span text:style-name="Основной_20_шрифт_20_абзаца"><text:span text:style-name="T2"> |</text:span></text:span></text:p>
      <text:p text:style-name="Standard"><text:span text:style-name="Основной_20_шрифт_20_абзаца"><text:span text:style-name="T2">| `</text:span></text:span><text:span text:style-name="Основной_20_шрифт_20_абзаца"><text:span text:style-name="T3">schedule</text:span></text:span><text:span text:style-name="Основной_20_шрифт_20_абзаца"><text:span text:style-name="T2">` | Планирование задач по расписанию |</text:span></text:span></text:p>
      <text:p text:style-name="Standard"/>
      <text:h text:style-name="Заголовок_20_1" text:outline-level="1"><text:bookmark-start text:name="__RefHeading___Toc667_2355785664"/>Постановка задачи<text:bookmark-end text:name="__RefHeading___Toc667_2355785664"/></text:h>
      <text:p text:style-name="Standard"/>
      <text:p text:style-name="Standard">1. Написать программы на языке программирования <text:span text:style-name="Основной_20_шрифт_20_абзаца"><text:span text:style-name="T1">Python</text:span></text:span>, которые:</text:p>
      <text:p text:style-name="Standard"><text:s text:c="3"/>- создают и удаляют пользователей;</text:p>
      <text:p text:style-name="Standard"><text:s text:c="3"/>- копируют и удаляют файлы;</text:p>
      <text:p text:style-name="Standard"><text:s text:c="3"/>- выводят данные о загрузке процессора, оперативной памяти и диска, а также список запущенных процессов;</text:p>
      <text:p text:style-name="Standard"><text:s text:c="3"/>- запускают выполнение задачи по расписанию;</text:p>
      <text:p text:style-name="Standard"><text:s text:c="3"/>- выполняют резервную копию данных и изменяют права доступа.</text:p>
      <text:p text:style-name="Standard"/>
      <text:p text:style-name="Standard">2. Оформить отчёт.</text:p>
      <text:p text:style-name="Standard"/>
      <text:h text:style-name="Заголовок_20_1" text:outline-level="1"><text:bookmark-start text:name="__RefHeading___Toc669_2355785664"/>Листинг программы<text:bookmark-end text:name="__RefHeading___Toc669_2355785664"/></text:h>
      <text:p text:style-name="Standard"/>
      <text:p text:style-name="Standard">Исходный код программы размещён в репозитории <text:span text:style-name="Основной_20_шрифт_20_абзаца"><text:span text:style-name="T1">GitHub</text:span></text:span>:</text:p>
      <text:p text:style-name="Standard"><text:span text:style-name="Основной_20_шрифт_20_абзаца"><text:span text:style-name="T1">https://github.com/PUM84/BMSTU_Python_MihalevSA</text:span></text:span></text:p>
      <text:h text:style-name="Заголовок_20_1" text:outline-level="1"><text:bookmark-start text:name="__RefHeading___Toc671_2355785664"/>Список использованной литературы и материалов<text:bookmark-end text:name="__RefHeading___Toc671_2355785664"/></text:h>
      <text:p text:style-name="P3"/>
      <text:list text:style-name="L1">
        <text:list-item>
          <text:p text:style-name="P9"><text:soft-page-break/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9">Брюс М. Ван Хорн <text:span text:style-name="Основной_20_шрифт_20_абзаца"><text:span text:style-name="T1">II</text:span></text:span>, Куан Нгуен. <text:span text:style-name="Основной_20_шрифт_20_абзаца"><text:span text:style-name="T1">PyCharm</text:span></text:span>: профессиональная работа на <text:span text:style-name="Основной_20_шрифт_20_абзаца"><text:span text:style-name="T1">Python</text:span></text:span> / пер. с англ. <text:span text:style-name="Основной_20_шрифт_20_абзаца"><text:span text:style-name="T1">И.Л. Люско. – М.:ДМК Пресс, 2024. – 618 с.: ил.</text:span></text:span></text:p>
        </text:list-item>
        <text:list-item>
          <text:p text:style-name="P1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9"><text:span text:style-name="Основной_20_шрифт_20_абзаца"><text:span text:style-name="T1">Git</text:span></text:span>. — Текст : электронный // <text:span text:style-name="Основной_20_шрифт_20_абзаца"><text:span text:style-name="T1">Git</text:span></text:span> : [сайт]. — <text:span text:style-name="Основной_20_шрифт_20_абзаца"><text:span text:style-name="T1">URL</text:span></text:span>: <text:span text:style-name="Основной_20_шрифт_20_абзаца"><text:span text:style-name="T1">https</text:span></text:span>://<text:span text:style-name="Основной_20_шрифт_20_абзаца"><text:span text:style-name="T1">git</text:span></text:span>-<text:span text:style-name="Основной_20_шрифт_20_абзаца"><text:span text:style-name="T1">scm</text:span></text:span>.<text:span text:style-name="Основной_20_шрифт_20_абзаца"><text:span text:style-name="T1">com</text:span></text:span>/ (дата обращения: 14.09.2025).</text:p>
        </text:list-item>
        <text:list-item>
          <text:p text:style-name="P9"><text:span text:style-name="Основной_20_шрифт_20_абзаца"><text:span text:style-name="T1">GitHub</text:span></text:span>. — Текст : электронный // <text:span text:style-name="Основной_20_шрифт_20_абзаца"><text:span text:style-name="T1">GitHub</text:span></text:span> : [сайт]. — <text:span text:style-name="Основной_20_шрифт_20_абзаца"><text:span text:style-name="T1">URL</text:span></text:span>: <text:span text:style-name="Основной_20_шрифт_20_абзаца"><text:span text:style-name="T1">https</text:span></text:span>://<text:span text:style-name="Основной_20_шрифт_20_абзаца"><text:span text:style-name="T1">github</text:span></text:span>.<text:span text:style-name="Основной_20_шрифт_20_абзаца"><text:span text:style-name="T1">com</text:span></text:span>/ (дата обращения: 14.09.2025).</text:p>
        </text:list-item>
        <text:list-item>
          <text:p text:style-name="P10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  <text:list-item>
          <text:p text:style-name="P9">Документация <text:span text:style-name="Основной_20_шрифт_20_абзаца"><text:span text:style-name="T1">psutil</text:span></text:span>. — Текст : электронный // <text:span text:style-name="Основной_20_шрифт_20_абзаца"><text:span text:style-name="T1">PyPI</text:span></text:span> : [сайт]. — <text:span text:style-name="Основной_20_шрифт_20_абзаца"><text:span text:style-name="T1">URL</text:span></text:span>: <text:span text:style-name="Основной_20_шрифт_20_абзаца"><text:span text:style-name="T1">https</text:span></text:span>://<text:span text:style-name="Основной_20_шрифт_20_абзаца"><text:span text:style-name="T1">pypi</text:span></text:span>.<text:span text:style-name="Основной_20_шрифт_20_абзаца"><text:span text:style-name="T1">org</text:span></text:span>/<text:span text:style-name="Основной_20_шрифт_20_абзаца"><text:span text:style-name="T1">project</text:span></text:span>/<text:span text:style-name="Основной_20_шрифт_20_абзаца"><text:span text:style-name="T1">psutil</text:span></text:span>/ (дата обращения: 29.05.2026).</text:p>
        </text:list-item>
        <text:list-item>
          <text:p text:style-name="P9">Документация <text:span text:style-name="Основной_20_шрифт_20_абзаца"><text:span text:style-name="T1">schedule</text:span></text:span>. — Текст : электронный // <text:span text:style-name="Основной_20_шрифт_20_абзаца"><text:span text:style-name="T1">PyPI</text:span></text:span> : [сайт]. — <text:span text:style-name="Основной_20_шрифт_20_абзаца"><text:span text:style-name="T1">URL</text:span></text:span>: <text:span text:style-name="Основной_20_шрифт_20_абзаца"><text:span text:style-name="T1">https</text:span></text:span>://<text:span text:style-name="Основной_20_шрифт_20_абзаца"><text:span text:style-name="T1">pypi</text:span></text:span>.<text:span text:style-name="Основной_20_шрифт_20_абзаца"><text:span text:style-name="T1">org</text:span></text:span>/<text:span text:style-name="Основной_20_шрифт_20_абзаца"><text:span text:style-name="T1">project</text:span></text:span>/<text:span text:style-name="Основной_20_шрифт_20_абзаца"><text:span text:style-name="T1">schedule</text:span></text:span>/ (дата обращения: 29.05.2026).</text:p>
        </text:list-item>
        <text:list-item>
          <text:p text:style-name="P9">Документация <text:span text:style-name="Основной_20_шрифт_20_абзаца"><text:span text:style-name="T1">paramiko</text:span></text:span>. — Текст : электронный // <text:span text:style-name="Основной_20_шрифт_20_абзаца"><text:span text:style-name="T1">PyPI</text:span></text:span> : [сайт]. — <text:span text:style-name="Основной_20_шрифт_20_абзаца"><text:span text:style-name="T1">URL</text:span></text:span>: <text:span text:style-name="Основной_20_шрифт_20_абзаца"><text:span text:style-name="T1">https</text:span></text:span>://<text:span text:style-name="Основной_20_шрифт_20_абзаца"><text:span text:style-name="T1">pypi</text:span></text:span>.<text:span text:style-name="Основной_20_шрифт_20_абзаца"><text:span text:style-name="T1">org</text:span></text:span>/<text:span text:style-name="Основной_20_шрифт_20_абзаца"><text:span text:style-name="T1">project</text:span></text:span>/<text:span text:style-name="Основной_20_шрифт_20_абзаца"><text:span text:style-name="T1">paramiko</text:span></text:span>/ (дата обращения: 29.05.2026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text-align="center" style:justify-single-word="false" fo:hyphenation-ladder-count="no-limit" fo:hyphenation-keep="auto" loext:hyphenation-keep-type="column" loext:hyphenation-keep-line="false"/>
      <style:text-properties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size="14pt" fo:font-weight="bold" style:font-name-asian="NSimSun" style:font-family-asian="NSimSun" style:font-family-generic-asian="modern" style:font-pitch-asian="fixed" style:font-size-asian="14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Heading" style:next-style-name="Text_20_body" style:default-outline-level="4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Footer"/>
      </style:footer>
      <style:footer-first>
        <text:p text:style-name="Нижний_20_колонтитул_20_по_20_центру">МОСКВА<text:line-break/>202<text:span text:style-name="Основной_20_шрифт_20_абзаца"><text:span text:style-name="MT1">6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creation-date>2026-06-06T09:37:00Z</meta:creation-date>
    <dc:date>2026-06-23T15:25:04.643914000</dc:date>
    <meta:editing-cycles>3</meta:editing-cycles>
    <meta:editing-duration>PT7M57S</meta:editing-duration>
    <meta:document-statistic meta:table-count="3" meta:image-count="1" meta:object-count="0" meta:page-count="5" meta:paragraph-count="89" meta:word-count="592" meta:character-count="4408" meta:non-whitespace-character-count="3879"/>
    <meta:template xlink:type="simple" xlink:actuate="onRequest" xlink:title="" xlink:href="Normal.dotm"/>
  </office:meta>
</office:document-meta>
</file>