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en" fo:country="US" officeooo:rsid="0015098b" officeooo:paragraph-rsid="002c06b5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officeooo:rsid="0027c778" officeooo:paragraph-rsid="0027c778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23e910" officeooo:paragraph-rsid="0016399b"/>
    </style:style>
    <style:style style:name="P12" style:family="paragraph" style:parent-style-name="Text_20_body">
      <style:text-properties fo:language="ru" fo:country="RU" officeooo:rsid="0023e910" officeooo:paragraph-rsid="0017c942"/>
    </style:style>
    <style:style style:name="P13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quote-cjk-patch" fo:letter-spacing="normal" fo:language="ru" fo:country="RU" fo:font-style="normal" fo:font-weight="bold" officeooo:rsid="0023e910" officeooo:paragraph-rsid="0017c942" style:font-weight-asian="bold" style:font-weight-complex="bold"/>
    </style:style>
    <style:style style:name="P16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officeooo:rsid="0023e910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18" style:family="paragraph" style:parent-style-name="Heading_20_3">
      <style:paragraph-properties fo:margin-left="0cm" fo:margin-right="0cm" fo:margin-top="0.847cm" fo:margin-bottom="0.423cm" style:contextual-spacing="false" fo:line-height="150%" fo:text-indent="0cm" style:auto-text-indent="false"/>
      <style:text-properties fo:font-variant="normal" fo:text-transform="none" fo:color="#000000" loext:opacity="100%" style:font-name="quote-cjk-patch" fo:letter-spacing="normal" fo:font-style="normal" fo:font-weight="normal" officeooo:rsid="0023e910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fo:color="#000000" loext:opacity="100%" officeooo:rsid="0023e910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fo:color="#000000" loext:opacity="100%" fo:font-size="10pt" officeooo:rsid="0023e910" style:font-size-asian="10pt" style:font-size-complex="10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150%" fo:padding="0cm" fo:border="none"/>
      <style:text-properties fo:color="#000000" loext:opacity="100%" fo:font-size="10pt" officeooo:rsid="0023e910" style:font-size-asian="10pt" style:font-size-complex="10pt"/>
    </style:style>
    <style:style style:name="P22" style:family="paragraph" style:parent-style-name="Heading_20_3">
      <style:paragraph-properties fo:margin-left="0cm" fo:margin-right="0cm" fo:margin-top="0.847cm" fo:margin-bottom="0.423cm" style:contextual-spacing="false" fo:line-height="150%" fo:text-indent="0cm" style:auto-text-indent="false"/>
      <style:text-properties fo:font-variant="normal" fo:text-transform="none" fo:color="#000000" loext:opacity="100%" style:font-name="quote-cjk-patch" fo:letter-spacing="normal" fo:font-style="normal" fo:font-weight="bold" officeooo:rsid="0023e910" style:font-weight-asian="bold" style:font-weight-complex="bold"/>
    </style:style>
    <style:style style:name="P23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 officeooo:rsid="0023e910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25" style:family="paragraph" style:parent-style-name="Heading_20_2">
      <style:paragraph-properties fo:margin-left="0cm" fo:margin-right="0cm" fo:margin-top="0.847cm" fo:margin-bottom="0.423cm" style:contextual-spacing="false" fo:line-height="150%" fo:text-indent="0cm" style:auto-text-indent="false"/>
      <style:text-properties fo:font-variant="normal" fo:text-transform="none" fo:color="#000000" loext:opacity="100%" style:font-name="quote-cjk-patch" fo:font-size="14pt" fo:letter-spacing="normal" fo:font-style="normal" fo:font-weight="normal" officeooo:rsid="0023e910"/>
    </style:style>
    <style:style style:name="P26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officeooo:rsid="0023e910" loext:padding="0cm" loext:border="none"/>
    </style:style>
    <style:style style:name="P27" style:family="paragraph" style:parent-style-name="Heading_20_2">
      <style:paragraph-properties fo:margin-left="0cm" fo:margin-right="0cm" fo:margin-top="0.847cm" fo:margin-bottom="0.423cm" style:contextual-spacing="false" fo:line-height="150%" fo:text-indent="0cm" style:auto-text-indent="false"/>
      <style:text-properties fo:font-variant="normal" fo:text-transform="none" fo:color="#000000" loext:opacity="100%" style:font-name="quote-cjk-patch" fo:font-size="14pt" fo:letter-spacing="normal" fo:font-style="normal" fo:font-weight="bold" officeooo:rsid="0023e910" style:font-weight-asian="bold" style:font-weight-complex="bold"/>
    </style:style>
    <style:style style:name="P28" style:family="paragraph" style:parent-style-name="Heading_20_3">
      <style:paragraph-properties fo:margin-left="0cm" fo:margin-right="0cm" fo:margin-top="0.847cm" fo:margin-bottom="0.423cm" style:contextual-spacing="false" fo:line-height="150%" fo:text-indent="0cm" style:auto-text-indent="false"/>
      <style:text-properties fo:font-variant="normal" fo:text-transform="none" fo:color="#000000" loext:opacity="100%" style:font-name="quote-cjk-patch" fo:letter-spacing="normal" fo:font-style="normal" style:text-underline-style="solid" style:text-underline-width="auto" style:text-underline-color="font-color" fo:font-weight="normal" officeooo:rsid="0023e910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30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31" style:family="paragraph" style:parent-style-name="Heading_20_4">
      <style:paragraph-properties fo:margin-left="0cm" fo:margin-right="0cm" fo:margin-top="0.423cm" fo:margin-bottom="0.423cm" style:contextual-spacing="false" fo:line-height="150%" fo:text-indent="0cm" style:auto-text-indent="false"/>
      <style:text-properties fo:font-variant="normal" fo:text-transform="none" fo:color="#000000" loext:opacity="100%" style:font-name="quote-cjk-patch" fo:font-size="12pt" fo:letter-spacing="normal" fo:font-style="normal" style:text-underline-style="solid" style:text-underline-width="auto" style:text-underline-color="font-color" fo:font-weight="normal" officeooo:rsid="0023e910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35" style:family="paragraph" style:parent-style-name="Heading_20_3">
      <style:paragraph-properties fo:margin-left="0cm" fo:margin-right="0cm" fo:margin-top="0.847cm" fo:margin-bottom="0.423cm" style:contextual-spacing="false" fo:line-height="150%" fo:text-indent="0cm" style:auto-text-indent="false"/>
      <style:text-properties officeooo:rsid="0023e910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fo:language="ru" fo:country="RU" officeooo:rsid="0023e910" officeooo:paragraph-rsid="0017c942"/>
    </style:style>
    <style:style style:name="P37" style:family="paragraph" style:parent-style-name="Text_20_body">
      <style:paragraph-properties fo:text-align="center" style:justify-single-word="false"/>
      <style:text-properties fo:language="ru" fo:country="RU" officeooo:rsid="0023e910" officeooo:paragraph-rsid="0030c728"/>
    </style:style>
    <style:style style:name="P38" style:family="paragraph" style:parent-style-name="Contents_20_Heading">
      <style:paragraph-properties fo:margin-top="0cm" fo:margin-bottom="0cm" style:contextual-spacing="false"/>
    </style:style>
    <style:style style:name="P39" style:family="paragraph" style:parent-style-name="Text_20_body">
      <style:paragraph-properties fo:text-align="start" style:justify-single-word="false"/>
      <style:text-properties fo:language="ru" fo:country="RU" officeooo:rsid="0023e910" officeooo:paragraph-rsid="0030c728"/>
    </style:style>
    <style:style style:name="P40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 officeooo:rsid="0023e910"/>
    </style:style>
    <style:style style:name="P41" style:family="paragraph" style:parent-style-name="Text_20_body" style:list-style-name="L8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42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rsid="0023e910"/>
    </style:style>
    <style:style style:name="P43" style:family="paragraph" style:parent-style-name="Heading_20_3">
      <style:paragraph-properties fo:margin-left="0cm" fo:margin-right="0cm" fo:margin-top="0.847cm" fo:margin-bottom="0.423cm" style:contextual-spacing="false" fo:line-height="150%" fo:text-align="start" style:justify-single-word="false" fo:text-indent="0cm" style:auto-text-indent="false"/>
      <style:text-properties fo:color="#000000" loext:opacity="100%" officeooo:rsid="0023e910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000000" loext:opacity="100%" fo:font-size="10pt" fo:font-style="italic" officeooo:rsid="0023e910" style:font-size-asian="10pt" style:font-style-asian="italic" style:font-size-complex="10pt" style:font-style-complex="italic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padding="0cm" fo:border="none"/>
      <style:text-properties fo:color="#000000" loext:opacity="100%" fo:font-size="10pt" fo:font-style="italic" officeooo:rsid="0023e910" style:font-size-asian="10pt" style:font-style-asian="italic" style:font-size-complex="10pt" style:font-style-complex="italic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officeooo:rsid="0023e910"/>
    </style:style>
    <style:style style:name="T1" style:family="text">
      <style:text-properties officeooo:rsid="002db7c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e58de"/>
    </style:style>
    <style:style style:name="T4" style:family="text">
      <style:text-properties officeooo:rsid="002c0e4a"/>
    </style:style>
    <style:style style:name="T5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fo:font-family="'var ds-font-family-code'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8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quote-cjk-patch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officeooo:rsid="0030c728"/>
    </style:style>
    <style:style style:name="T11" style:family="text">
      <style:text-properties fo:font-variant="normal" fo:text-transform="none" style:font-name="quote-cjk-patch" fo:letter-spacing="normal" fo:font-style="normal" fo:font-weight="normal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<text:span text:style-name="T1">12</text:span></text:p>
      <text:p text:style-name="Standard"/>
      <text:p text:style-name="P4"><text:span text:style-name="T2">Тема лабораторной работы: </text:span><text:span text:style-name="T3">Создания модуля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С.А. Михал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</text:index-title>
          <text:p text:style-name="P10"><text:a xlink:type="simple" xlink:href="#__RefHeading___Toc1116_1594055144" text:style-name="Index_20_Link" text:visited-style-name="Index_20_Link">Постановка задачи<text:tab/>2</text:a></text:p>
          <text:p text:style-name="P10"><text:a xlink:type="simple" xlink:href="#__RefHeading___Toc1118_1594055144" text:style-name="Index_20_Link" text:visited-style-name="Index_20_Link">Теоретическая часть<text:tab/><text:span text:style-name="T4">3</text:span></text:a></text:p>
          <text:p text:style-name="P10"><text:a xlink:type="simple" xlink:href="#__RefHeading___Toc1126_1594055144" text:style-name="Index_20_Link" text:visited-style-name="Index_20_Link">Листинг программы<text:tab/></text:a><text:span text:style-name="T1">4</text:span></text:p>
          <text:p text:style-name="P10"><text:a xlink:type="simple" xlink:href="#__RefHeading___Toc1128_1594055144" text:style-name="Index_20_Link" text:visited-style-name="Index_20_Link">Результат работы программы<text:tab/><text:span text:style-name="T4">4</text:span></text:a></text:p>
          <text:p text:style-name="P10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1">6</text:span></text:p>
        </text:index-body>
      </text:table-of-content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Постановка задачи</text:p>
      <text:p text:style-name="P14"/>
      <text:p text:style-name="P14">Цель работы: дать студентам практический навык использования модулей и пакетов языка программирования Python для организации программного кода в проектах.</text:p>
      <text:p text:style-name="P14"/>
      <text:p text:style-name="P14">Задачи работы:</text:p>
      <text:p text:style-name="P14">1. Создать собственный модуль на языке Python, содержащий не менее одной константы и четырёх функций. Написать программу, реализующую различные варианты импорта модуля: импорт всего модуля, импорт конкретных элементов, импорт с переименованием, импорт всех элементов.</text:p>
      <text:p text:style-name="P14"/>
      <text:p text:style-name="P14">2. Дополнить пакет специальными переменными модуля: переменная __name__ (позволяет определить, запущен ли модуль как программа или импортирован) и переменная __all__ (определяет, какие имена будут импортированы при импорте всех элементов модуля).</text:p>
      <text:p text:style-name="P14"/>
      <text:p text:style-name="P14">3. Создать собственный пакет на языке Python, содержащий не менее одного подпакета и двух модулей. Реализовать различные варианты импорта из пакета: импорт модуля из пакета, импорт определённых элементов из модуля в пакете, импорт из подпакета, относительный импорт.</text:p>
      <text:p text:style-name="P14"/>
      <text:p text:style-name="P14">4. Выполнить корректировку программ, написанных для лабораторных работ №1, 4 и 5, с таким условием, чтобы функции, написанные в них, были доступны как элементы соответствующих модулей и пакетов.</text:p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Теоретическая часть</text:p>
      <text:h text:style-name="P15" text:outline-level="3">Модули и пакеты в Python</text:h>
      <text:p text:style-name="P16"><text:span text:style-name="T5">Модули в Python представляют собой файлы с расширением </text:span><text:span text:style-name="Source_20_Text"><text:span text:style-name="T6">.py</text:span></text:span><text:span text:style-name="T5">, содержащие определения функций, классов и переменных. Они позволяют структурировать код, обеспечивая его повторное использование и логическую организацию. Пакеты, в свою очередь, являются каталогами, содержащими несколько модулей и специальный файл </text:span><text:span text:style-name="Source_20_Text"><text:span text:style-name="T6">__init__.py</text:span></text:span><text:span text:style-name="T5">, который указывает интерпретатору, что данный каталог следует рассматривать как пакет.</text:span></text:p>
      <text:p text:style-name="P16"><text:span text:style-name="Strong_20_Emphasis"><text:span text:style-name="T7">Ключевые механизмы импорта:</text:span></text:span></text:p>
      <text:list text:style-name="L1">
        <text:list-item>
          <text:p text:style-name="P17"><text:span text:style-name="Source_20_Text"><text:span text:style-name="T6">import module</text:span></text:span><text:span text:style-name="T5"> — импорт всего модуля с сохранением пространства имен</text:span></text:p>
        </text:list-item>
        <text:list-item>
          <text:p text:style-name="P17"><text:span text:style-name="Source_20_Text"><text:span text:style-name="T6">from module import name</text:span></text:span><text:span text:style-name="T5"> — импорт конкретных элементов в текущее пространство имен</text:span></text:p>
        </text:list-item>
        <text:list-item>
          <text:p text:style-name="P17"><text:span text:style-name="Source_20_Text"><text:span text:style-name="T6">import module as alias</text:span></text:span><text:span text:style-name="T5"> — импорт с переименованием для удобства использования</text:span></text:p>
        </text:list-item>
        <text:list-item>
          <text:p text:style-name="P17"><text:span text:style-name="Source_20_Text"><text:span text:style-name="T6">from module import *</text:span></text:span><text:span text:style-name="T5"> — импорт всех элементов, перечисленных в </text:span><text:span text:style-name="Source_20_Text"><text:span text:style-name="T6">__all__</text:span></text:span></text:p>
        </text:list-item>
        <text:list-item>
          <text:p text:style-name="P17"><text:span text:style-name="Source_20_Text"><text:span text:style-name="T6">__all__</text:span></text:span><text:span text:style-name="T5"> — специальный список, определяющий, какие имена будут экспортированы при использовании </text:span><text:span text:style-name="Source_20_Text"><text:span text:style-name="T6">from module import *</text:span></text:span></text:p>
        </text:list-item>
      </text:list>
      <text:h text:style-name="P18" text:outline-level="3">Организация пакетов</text:h>
      <text:p text:style-name="P19"><text:span text:style-name="T8">В рамках лабораторной работы создана следующая структура пакетов:</text:span></text:p>
      <text:p text:style-name="P20">mypackage/</text:p>
      <text:p text:style-name="P21">├── __init__.py <text:s text:c="9"/># Инициализация пакета, определяет __all__ и импортирует <text:tab/><text:tab/><text:tab/><text:tab/><text:tab/> <text:s text:c="2"/>подмодули</text:p>
      <text:p text:style-name="P21">├── mod1.py <text:s text:c="13"/># Модуль с функциями для работы со списками</text:p>
      <text:p text:style-name="P21">├── mod2.py <text:s text:c="13"/># Модуль с математическими функциями</text:p>
      <text:p text:style-name="P21">└── subpkg/ <text:s text:c="13"/># Вложенный пакет</text:p>
      <text:p text:style-name="P21"><text:s text:c="4"/>├── __init__.py</text:p>
      <text:p text:style-name="P21"><text:s text:c="4"/>└── extra.py <text:s text:c="8"/># Дополнительные утилиты</text:p>
      <text:h text:style-name="P22" text:outline-level="3"><text:soft-page-break/>Используемые технологии</text:h>
      <text:p text:style-name="P23">В работе применяются следующие подходы:</text:p>
      <text:list text:style-name="L2">
        <text:list-item>
          <text:p text:style-name="P24"><text:span text:style-name="Strong_20_Emphasis"><text:span text:style-name="T7">Динамический импорт</text:span></text:span><text:span text:style-name="T5"> — возможность импорта модулей на этапе выполнения</text:span></text:p>
        </text:list-item>
        <text:list-item>
          <text:p text:style-name="P24"><text:span text:style-name="Strong_20_Emphasis"><text:span text:style-name="T7">Абсолютные и относительные импорты</text:span></text:span><text:span text:style-name="T5"> — для организации иерархических связей между модулями</text:span></text:p>
        </text:list-item>
        <text:list-item>
          <text:p text:style-name="P24"><text:span text:style-name="Strong_20_Emphasis"><text:span text:style-name="T7">Скрытие реализации</text:span></text:span><text:span text:style-name="T5"> — использование </text:span><text:span text:style-name="Source_20_Text"><text:span text:style-name="T6">__all__</text:span></text:span><text:span text:style-name="T5"> для контроля экспортируемых имен</text:span></text:p>
        </text:list-item>
        <text:list-item>
          <text:p text:style-name="P24"><text:span text:style-name="Strong_20_Emphasis"><text:span text:style-name="T7">Самотестирование модулей</text:span></text:span><text:span text:style-name="T5"> — конструкция </text:span><text:span text:style-name="Source_20_Text"><text:span text:style-name="T6">if __name__ == '__main__'</text:span></text:span><text:span text:style-name="T5">для автономной проверки</text:span></text:p>
        </text:list-item>
      </text:list>
      <text:h text:style-name="P25" text:outline-level="2">Структура проекта</text:h>
      <text:p text:style-name="P26"/>
      <text:p text:style-name="P20">lab13_modules/</text:p>
      <text:p text:style-name="P21">├── demo_import.py <text:s text:c="7"/># Основной скрипт, демонстрирующий импорты</text:p>
      <text:p text:style-name="P21">├── mymodule.py <text:s text:c="10"/># Главный модуль с функциями из предыдущих работ</text:p>
      <text:p text:style-name="P21">└── mypackage/ <text:s text:c="11"/># Пакет с дополнительной функциональностью</text:p>
      <text:p text:style-name="P21"><text:s text:c="4"/>├── __init__.py <text:s text:c="6"/># Инициализация пакета</text:p>
      <text:p text:style-name="P21"><text:s text:c="4"/>├── mod1.py <text:s text:c="10"/># Утилиты для работы со списками</text:p>
      <text:p text:style-name="P21"><text:s text:c="4"/>├── mod2.py <text:s text:c="10"/># Математические функции</text:p>
      <text:p text:style-name="P21"><text:s text:c="4"/>└── subpkg/ <text:s text:c="10"/># Вложенный подпакет</text:p>
      <text:p text:style-name="P21"><text:s text:c="8"/>├── __init__.py</text:p>
      <text:p text:style-name="P21"><text:s text:c="8"/>└── extra.py <text:s text:c="5"/># Дополнительные операции</text:p>
      <text:h text:style-name="P27" text:outline-level="2">Описание модулей и пакетов</text:h>
      <text:h text:style-name="P28" text:outline-level="3">Модуль mymodule.py</text:h>
      <text:p text:style-name="P23">Основной модуль, содержащий функции из предыдущих лабораторных работ:</text:p>
      <text:list text:style-name="L3">
        <text:list-item>
          <text:p text:style-name="P29"><text:span text:style-name="Strong_20_Emphasis"><text:span text:style-name="T7">hello()</text:span></text:span><text:span text:style-name="T5"> — выводит приветственное сообщение</text:span></text:p>
        </text:list-item>
        <text:list-item>
          <text:p text:style-name="P29"><text:span text:style-name="Strong_20_Emphasis"><text:span text:style-name="T7">calc_expression(x)</text:span></text:span><text:span text:style-name="T5"> — вычисляет два тригонометрических выражения с использованием математических функций</text:span></text:p>
        </text:list-item>
        <text:list-item>
          <text:p text:style-name="P29"><text:soft-page-break/><text:span text:style-name="Strong_20_Emphasis"><text:span text:style-name="T7">process_array(n)</text:span></text:span><text:span text:style-name="T5"> — генерирует массив случайных чисел, вычисляет произведение элементов с чётными индексами, сортирует массив и находит сумму внутренних элементов</text:span></text:p>
        </text:list-item>
        <text:list-item>
          <text:p text:style-name="P29"><text:span text:style-name="Strong_20_Emphasis"><text:span text:style-name="T7">process_matrix(n)</text:span></text:span><text:span text:style-name="T5"> — создает квадратную матрицу, определяет количество столбцов с нулевыми элементами и находит строку с самой длинной серией повторяющихся чисел</text:span></text:p>
        </text:list-item>
      </text:list>
      <text:p text:style-name="P23">Модуль содержит:</text:p>
      <text:list text:style-name="L4">
        <text:list-item>
          <text:p text:style-name="P30"><text:span text:style-name="T5">Атрибут </text:span><text:span text:style-name="Source_20_Text"><text:span text:style-name="T6">VERSION</text:span></text:span><text:span text:style-name="T5"> для управления версионированием</text:span></text:p>
        </text:list-item>
        <text:list-item>
          <text:p text:style-name="P30"><text:span text:style-name="T5">Список </text:span><text:span text:style-name="Source_20_Text"><text:span text:style-name="T6">__all__</text:span></text:span><text:span text:style-name="T5"> для контроля экспортируемых имен</text:span></text:p>
        </text:list-item>
        <text:list-item>
          <text:p text:style-name="P30"><text:span text:style-name="T5">Блок </text:span><text:span text:style-name="Source_20_Text"><text:span text:style-name="T6">if __name__ == '__main__'</text:span></text:span><text:span text:style-name="T5"> для самотестирования</text:span></text:p>
        </text:list-item>
      </text:list>
      <text:h text:style-name="P28" text:outline-level="3">Пакет mypackage</text:h>
      <text:h text:style-name="P31" text:outline-level="4">Модуль mod1.py</text:h>
      <text:p text:style-name="P23">Содержит утилиты для работы с последовательностями:</text:p>
      <text:list text:style-name="L5">
        <text:list-item>
          <text:p text:style-name="P32"><text:span text:style-name="Source_20_Text"><text:span text:style-name="T6">unique_elements(lst)</text:span></text:span><text:span text:style-name="T5"> — возвращает список уникальных элементов из переданного списка</text:span></text:p>
        </text:list-item>
        <text:list-item>
          <text:p text:style-name="P32"><text:span text:style-name="Source_20_Text"><text:span text:style-name="T6">flatten(nested_list)</text:span></text:span><text:span text:style-name="T5"> — преобразует вложенный список в плоский</text:span></text:p>
        </text:list-item>
      </text:list>
      <text:h text:style-name="P31" text:outline-level="4">Модуль mod2.py</text:h>
      <text:p text:style-name="P23">Содержит математические функции:</text:p>
      <text:list text:style-name="L6">
        <text:list-item>
          <text:p text:style-name="P33"><text:span text:style-name="Source_20_Text"><text:span text:style-name="T6">is_prime(n)</text:span></text:span><text:span text:style-name="T5"> — проверяет, является ли число простым</text:span></text:p>
        </text:list-item>
        <text:list-item>
          <text:p text:style-name="P33"><text:span text:style-name="Source_20_Text"><text:span text:style-name="T6">fibonacci(n)</text:span></text:span><text:span text:style-name="T5"> — возвращает n-е число Фибоначчи</text:span></text:p>
        </text:list-item>
      </text:list>
      <text:h text:style-name="P31" text:outline-level="4">Подпакет subpkg.extra</text:h>
      <text:p text:style-name="P23">Содержит дополнительную функцию:</text:p>
      <text:list text:style-name="L7">
        <text:list-item>
          <text:p text:style-name="P34"><text:span text:style-name="Source_20_Text"><text:span text:style-name="T6">multiply(a, b)</text:span></text:span><text:span text:style-name="T5"> — возвращает произведение двух чисел</text:span></text:p>
        </text:list-item>
      </text:list>
      <text:h text:style-name="P35" text:outline-level="3"><text:soft-page-break/><text:span text:style-name="T9">Файл </text:span><text:span text:style-name="Strong_20_Emphasis"><text:span text:style-name="T9">init</text:span></text:span><text:span text:style-name="T9">.py</text:span></text:h>
      <text:p text:style-name="P16"><text:span text:style-name="T5">Инициализирует пакет, определяет список экспортируемых модулей и выполняет их импорт для удобства использования.</text:span></text:p>
      <text:p text:style-name="P13">Листинг программы</text:p>
      <text:p text:style-name="P14"/>
      <text:p text:style-name="P14">Исходный код программы размещён в репозитории GitHub:</text:p>
      <text:p text:style-name="P14">https://github.com/<text:span text:style-name="T10">PUM84</text:span>/BMSTU_Python_<text:span text:style-name="T10">MihalevSA</text:span></text:p>
      <text:p text:style-name="P36"/>
      <text:p text:style-name="P37"><text:span text:style-name="Strong_20_Emphasis"><text:span text:style-name="T7"><draw:frame draw:style-name="fr1" draw:name="Frame1" text:anchor-type="as-char" draw:z-index="1"><draw:text-box fo:min-height="0cm" fo:min-width="0cm"><text:p text:style-name="P38"><text:span text:style-name="Strong_20_Emphasis">Результат работы программы:</text:span></text:p></draw:text-box></draw:frame></text:span></text:span></text:p>
      <text:p text:style-name="P39"><text:span text:style-name="Strong_20_Emphasis"><text:span text:style-name="T7">Импорт всего модуля</text:span></text:span><text:span text:style-name="T5"> </text:span><text:span text:style-name="Source_20_Text"><text:span text:style-name="T6">mymodule</text:span></text:span><text:span text:style-name="T5">:</text:span></text:p>
      <text:list text:style-name="L8">
        <text:list-item>
          <text:list>
            <text:list-item>
              <text:p text:style-name="P40">Выводится версия модуля и приветствие</text:p>
            </text:list-item>
            <text:list-item>
              <text:p text:style-name="P40">Вычисляются тригонометрические выражения для заданного значения</text:p>
            </text:list-item>
            <text:list-item>
              <text:p text:style-name="P40">Генерируется и обрабатывается массив чисел</text:p>
            </text:list-item>
          </text:list>
        </text:list-item>
        <text:list-item>
          <text:p text:style-name="P41"><text:span text:style-name="Strong_20_Emphasis"><text:span text:style-name="T7">Импорт конкретных функций</text:span></text:span><text:span text:style-name="T5"> из модуля:</text:span></text:p>
          <text:list>
            <text:list-item>
              <text:p text:style-name="P42"><text:span text:style-name="T5">Прямой доступ к функциям </text:span><text:span text:style-name="Source_20_Text"><text:span text:style-name="T6">calc_expression</text:span></text:span><text:span text:style-name="T5"> и </text:span><text:span text:style-name="Source_20_Text"><text:span text:style-name="T6">process_array</text:span></text:span><text:span text:style-name="T5"> без префикса модуля</text:span></text:p>
            </text:list-item>
          </text:list>
        </text:list-item>
        <text:list-item>
          <text:p text:style-name="P41"><text:span text:style-name="Strong_20_Emphasis"><text:span text:style-name="T7">Импорт с переименованием</text:span></text:span><text:span text:style-name="T5">:</text:span></text:p>
          <text:list>
            <text:list-item>
              <text:p text:style-name="P42"><text:span text:style-name="T5">Модуль </text:span><text:span text:style-name="Source_20_Text"><text:span text:style-name="T6">mymodule</text:span></text:span><text:span text:style-name="T5"> импортируется как </text:span><text:span text:style-name="Source_20_Text"><text:span text:style-name="T6">mm</text:span></text:span><text:span text:style-name="T5"> для сокращения записи</text:span></text:p>
            </text:list-item>
          </text:list>
        </text:list-item>
        <text:list-item>
          <text:p text:style-name="P41"><text:span text:style-name="Strong_20_Emphasis"><text:span text:style-name="T7">Импорт элементов из пакета</text:span></text:span><text:span text:style-name="T5">:</text:span></text:p>
          <text:list>
            <text:list-item>
              <text:p text:style-name="P42"><text:span text:style-name="T5">Функция </text:span><text:span text:style-name="Source_20_Text"><text:span text:style-name="T6">unique_elements</text:span></text:span><text:span text:style-name="T5"> из </text:span><text:span text:style-name="Source_20_Text"><text:span text:style-name="T6">mypackage.mod1</text:span></text:span></text:p>
            </text:list-item>
            <text:list-item>
              <text:p text:style-name="P42"><text:span text:style-name="T5">Функция </text:span><text:span text:style-name="Source_20_Text"><text:span text:style-name="T6">is_prime</text:span></text:span><text:span text:style-name="T5"> из </text:span><text:span text:style-name="Source_20_Text"><text:span text:style-name="T6">mypackage.mod2</text:span></text:span></text:p>
            </text:list-item>
          </text:list>
        </text:list-item>
        <text:list-item>
          <text:p text:style-name="P41"><text:span text:style-name="Strong_20_Emphasis"><text:span text:style-name="T7">Импорт из вложенного подпакета</text:span></text:span><text:span text:style-name="T5">:</text:span></text:p>
          <text:list>
            <text:list-item>
              <text:p text:style-name="P42"><text:span text:style-name="T5">Функция </text:span><text:span text:style-name="Source_20_Text"><text:span text:style-name="T6">multiply</text:span></text:span><text:span text:style-name="T5"> из </text:span><text:span text:style-name="Source_20_Text"><text:span text:style-name="T6">mypackage.subpkg.extra</text:span></text:span></text:p>
            </text:list-item>
          </text:list>
        </text:list-item>
      </text:list>
      <text:h text:style-name="P43" text:outline-level="3"><text:span text:style-name="T11">Вывод программы</text:span></text:h>
      <text:p text:style-name="P44">Версия mymodule: 1.0.0</text:p>
      <text:p text:style-name="P45">Hello Python!</text:p>
      <text:p text:style-name="P45">y1=1.500, y2=2.995</text:p>
      <text:p text:style-name="P45">mult=18.503, sum=-0.504</text:p>
      <text:p text:style-name="P45"><text:soft-page-break/>Hello Python!</text:p>
      <text:p text:style-name="P45">Hello Python!</text:p>
      <text:p text:style-name="P45">&lt;function process_array at 0x...&gt;</text:p>
      <text:p text:style-name="P45">[1, 2, 3]</text:p>
      <text:p text:style-name="P45">True</text:p>
      <text:p text:style-name="P45">21</text:p>
      <text:p text:style-name="P46"/>
      <text:p text:style-name="P13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</text:p>
      <text:p text:style-name="P14">4. Документация Python по модулям и пакетам. — URL: https://docs.python.org/3/tutorial/modules.html</text:p>
      <text:p text:style-name="P14">5. Git. — Текст : электронный // Git : [сайт]. — URL: https://git-scm.com/</text:p>
      <text:p text:style-name="P14">6. GitHub. — Текст : электронный // GitHub : [сайт]. — URL: https://github.com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2f80c7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7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1:13:38.857839356</meta:creation-date>
    <meta:editing-duration>PT20M36S</meta:editing-duration>
    <meta:editing-cycles>9</meta:editing-cycles>
    <meta:generator>LibreOffice/25.8.1.1$MacOSX_X86_64 LibreOffice_project/54047653041915e595ad4e45cccea684809c77b5</meta:generator>
    <dc:title>my_default</dc:title>
    <dc:date>2026-06-25T09:25:15.851671000</dc:date>
    <meta:document-statistic meta:table-count="3" meta:image-count="1" meta:object-count="0" meta:page-count="9" meta:paragraph-count="130" meta:word-count="891" meta:character-count="7029" meta:non-whitespace-character-count="6096"/>
  </office:meta>
</office:document-meta>
</file>