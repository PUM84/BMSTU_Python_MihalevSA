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en" fo:country="US" officeooo:rsid="0015098b" officeooo:paragraph-rsid="002c06b5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officeooo:rsid="0027c778" officeooo:paragraph-rsid="0027c778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23e910" officeooo:paragraph-rsid="0016399b"/>
    </style:style>
    <style:style style:name="P12" style:family="paragraph" style:parent-style-name="Text_20_body">
      <style:text-properties fo:language="ru" fo:country="RU" officeooo:rsid="0023e910" officeooo:paragraph-rsid="0017c942"/>
    </style:style>
    <style:style style:name="P13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T1" style:family="text">
      <style:text-properties officeooo:rsid="002d77a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df79f"/>
    </style:style>
    <style:style style:name="T4" style:family="text">
      <style:text-properties officeooo:rsid="0030a080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11</text:span></text:p>
      <text:p text:style-name="Standard"/>
      <text:p text:style-name="P4"><text:span text:style-name="T2">Тема лабораторной работы: </text:span><text:span text:style-name="T3">Структуры данных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10"><text:a xlink:type="simple" xlink:href="#__RefHeading___Toc1116_1594055144" text:style-name="Index_20_Link" text:visited-style-name="Index_20_Link">Постановка задачи<text:tab/>2</text:a></text:p>
          <text:p text:style-name="P10"><text:a xlink:type="simple" xlink:href="#__RefHeading___Toc1118_1594055144" text:style-name="Index_20_Link" text:visited-style-name="Index_20_Link">Теоретическая часть<text:tab/><text:span text:style-name="T1">2</text:span></text:a></text:p>
          <text:p text:style-name="P10"><text:a xlink:type="simple" xlink:href="#__RefHeading___Toc1126_1594055144" text:style-name="Index_20_Link" text:visited-style-name="Index_20_Link">Листинг программы<text:tab/><text:span text:style-name="T1">5</text:span></text:a></text:p>
          <text:p text:style-name="P10"><text:a xlink:type="simple" xlink:href="#__RefHeading___Toc1128_1594055144" text:style-name="Index_20_Link" text:visited-style-name="Index_20_Link">Результат работы программы<text:tab/><text:span text:style-name="T1">5</text:span></text:a></text:p>
          <text:p text:style-name="P10"><text:a xlink:type="simple" xlink:href="#__RefHeading___Toc1130_1594055144" text:style-name="Index_20_Link" text:visited-style-name="Index_20_Link">Список использованной литературы и материалов<text:tab/><text:span text:style-name="T1">7</text:span></text:a></text:p>
        </text:index-body>
      </text:table-of-content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Постановка задачи</text:p>
      <text:p text:style-name="P14"/>
      <text:p text:style-name="P14">Цель лабораторной работы: изучить основы языка программирования Python, научиться работать с целочисленной арифметикой, а также освоить основные структуры данных: списки, кортежи, словари и множества.</text:p>
      <text:p text:style-name="P14"/>
      <text:p text:style-name="P14">В рамках работы необходимо решить 5 задач из таблицы, приведённой в методическом пособии, а также дополнительные задачи, указанные преподавателем. При решении задач на целочисленную арифметику разрешается использовать только арифметические операции +, -, *, //, %, **. Запрещается использование условных операторов (if), циклов (for, while) и дополнительных функций (кроме input, print, int, abs). Для задач со структурами данных разрешается использование соответствующих методов.</text:p>
      <text:p text:style-name="P14"/>
      <text:p text:style-name="P13">Теоретическая часть</text:p>
      <text:p text:style-name="P14"/>
      <text:p text:style-name="P14">Типы данных и функции вывода.</text:p>
      <text:p text:style-name="P14">Программы на языке Python представляют собой обычные текстовые файлы, в которых записана последовательность команд. Код легко читается и интуитивно понятен. Для вывода информации используется функция print, которая может принимать несколько параметров. Параметры выводятся через пробел, но это поведение можно изменить с помощью именованного параметра sep (разделитель). Также можно управлять символом после вывода с помощью параметра end (по умолчанию это перевод строки).</text:p>
      <text:p text:style-name="P14"/>
      <text:p text:style-name="P14">Для ввода данных используется функция input, которая считывает строку из консоли. Для преобразования строки в целое число применяется функция int. Например:</text:p>
      <text:p text:style-name="P14">a = int(input())</text:p>
      <text:p text:style-name="P14">b = int(input())</text:p>
      <text:p text:style-name="P14">print(a + b)</text:p>
      <text:p text:style-name="P14"><text:soft-page-break/></text:p>
      <text:p text:style-name="P14">Арифметические операции.</text:p>
      <text:p text:style-name="P14"/>
      <text:p text:style-name="P14">В Python поддерживаются следующие арифметические операции: сложение (+), вычитание (-), умножение (*), целочисленное деление (//), остаток от деления (%), возведение в степень (**). Все операции инфиксные (записываются между операндами).</text:p>
      <text:p text:style-name="P14"/>
      <text:p text:style-name="P14">Для любых целых чисел A и B (B &gt; 0) выполняются соотношения: A = B * (A // B) + (A % B), причём 0 ≤ (A % B) &lt; B. Это важно для понимания работы остатка от деления отрицательных чисел. Например, при делении -5 на 2 целая часть равна -3, а остаток равен 1, так как -5 = 2 * (-3) + 1.</text:p>
      <text:p text:style-name="P14"/>
      <text:p text:style-name="P14">Целые числа в Python не имеют ограничений на длину (кроме объёма доступной памяти).</text:p>
      <text:p text:style-name="P14"/>
      <text:p text:style-name="P14">Операции над строками.</text:p>
      <text:p text:style-name="P14"/>
      <text:p text:style-name="P14">Строки можно сохранять в переменные, склеивать с помощью операции +, умножать на целое неотрицательное число (повторение строки). Для преобразования числа в строку используется функция str. Экранирование символов выполняется с помощью обратной косой черты (например, \n для перевода строки, \t для табуляции, \' и \" для кавычек).</text:p>
      <text:p text:style-name="P14"/>
      <text:p text:style-name="P14">Списки.</text:p>
      <text:p text:style-name="P14"/>
      <text:p text:style-name="P14">Списки в Python — это упорядоченные изменяемые коллекции объектов произвольных типов. Создать список можно двумя основными способами: с помощью квадратных скобок (например, empty_list = [] или letters_list = ['a', 'b', 'c']) или с помощью метода list (например, list('abc') вернёт ['a', 'b', 'c']). Списки могут <text:soft-page-break/>содержать элементы разных типов, включая вложенные списки. Списки поддерживают операции индексации, срезы, добавление элементов (append), удаление элементов (pop, remove) и многие другие.</text:p>
      <text:p text:style-name="P14"/>
      <text:p text:style-name="P14">Кортежи.</text:p>
      <text:p text:style-name="P14"/>
      <text:p text:style-name="P14">Кортеж (tuple) — это неизменяемая структура данных, похожая на список. Кортеж защищён от изменений, занимает меньше памяти по сравнению со списком, а также может использоваться в качестве ключа словаря (в отличие от списка). Создать кортеж можно двумя способами: с помощью метода tuple (например, tuple((1, 2, 3, 4))) или с помощью круглых скобок (например, tpl = (1, 2, 3, 4)). Доступ к элементам кортежа осуществляется по индексу, но изменять элементы нельзя. К кортежам применимы операции сложения, умножения на число, методы index() и count().</text:p>
      <text:p text:style-name="P14"/>
      <text:p text:style-name="P14">Словари.</text:p>
      <text:p text:style-name="P14"/>
      <text:p text:style-name="P14">Словари (dict) — это неупорядоченные коллекции произвольных объектов с доступом по ключу. Их также называют ассоциативными массивами или хеш-таблицами. Создать словарь можно двумя способами: с помощью фигурных скобок (например, empty_dict = {} или value_dict = {'key1': 'value1', 'key2': 4}) или с помощью метода dict (например, dict(key1='value1', key2=4)). Ключами словаря могут быть только неизменяемые типы (числа, строки, кортежи), значениями — любые объекты. Доступ к значению осуществляется по ключу: value_dict['key1'].</text:p>
      <text:p text:style-name="P14"/>
      <text:p text:style-name="P14">Множества.</text:p>
      <text:p text:style-name="P14"/>
      <text:p text:style-name="P14">Множество (set) — это контейнер, содержащий неповторяющиеся элементы в случайном порядке. Создать множество можно двумя способами: с помощью метода set (например, set({1, 2, 3, 4}) или set('Строка')) или с помощью фигурных скобок (например, st = {1, 2, 3, 4}). Важно: пустое множество нельзя создать с помощью {}, <text:soft-page-break/>так как это создаст пустой словарь. Для пустого множества используется set(). Множества поддерживают операции объединения (|), пересечения (&amp;), разности (-) и симметрической разности (^).</text:p>
      <text:p text:style-name="P14"/>
      <text:p text:style-name="P14">Переменные.</text:p>
      <text:p text:style-name="P14"/>
      <text:p text:style-name="P14">В языке Python все переменные являются ссылками на объекты. Каждый объект имеет тип (int, str, list, tuple, dict, set и др.) и содержимое. Переменные можно представлять как ярлычки, привязанные к объектам. К одному объекту может быть привязано несколько переменных. Типы int и str являются неизменяемыми — любое присваивание не изменяет объект, а создаёт новый объект и привязывает к нему ссылку.</text:p>
      <text:p text:style-name="P14"/>
      <text:p text:style-name="P13">Листинг программы</text:p>
      <text:p text:style-name="P13"/>
      <text:p text:style-name="P14">Исходный код программы размещён в репозитории GitHub:</text:p>
      <text:p text:style-name="P14">https://github.com/<text:span text:style-name="T4">PUM84</text:span>/BMSTU_Python_<text:span text:style-name="T4">MihalevSA</text:span></text:p>
      <text:p text:style-name="P14"/>
      <text:p text:style-name="P13">Результат работы программы</text:p>
      <text:p text:style-name="P14"/>
      <text:p text:style-name="P14">=== Задача 1. Делёж яблок ===</text:p>
      <text:p text:style-name="P14">Введите количество школьников: 3</text:p>
      <text:p text:style-name="P14">Введите количество яблок: 14</text:p>
      <text:p text:style-name="P14">Каждому школьнику: 4</text:p>
      <text:p text:style-name="P14">Останется в корзинке: 2</text:p>
      <text:p text:style-name="P14"/>
      <text:p text:style-name="P14">=== Задача 2. Настольный теннис ===</text:p>
      <text:p text:style-name="P14">Стоимость комплекта ракеток (руб): 1500</text:p>
      <text:p text:style-name="P14">Стоимость одного шарика (руб): 50</text:p>
      <text:p text:style-name="P14">Сколько всего денег у тебя (руб): 2000</text:p>
      <text:p text:style-name="P14"><text:soft-page-break/>Ты купил 10 шариков</text:p>
      <text:p text:style-name="P14"/>
      <text:p text:style-name="P14">=== Задача 3. Предпоследняя цифра ===</text:p>
      <text:p text:style-name="P14">Введите натуральное число: 179</text:p>
      <text:p text:style-name="P14">Предпоследняя цифра: 7</text:p>
      <text:p text:style-name="P14"/>
      <text:p text:style-name="P14">=== Задача 4. Сумма цифр четырёхзначного числа ===</text:p>
      <text:p text:style-name="P14">Введите четырёхзначное число: 2020</text:p>
      <text:p text:style-name="P14">Сумма цифр: 4</text:p>
      <text:p text:style-name="P14"/>
      <text:p text:style-name="P14">=== Задача 5. Электронные часы ===</text:p>
      <text:p text:style-name="P14">Сколько минут прошло с начала суток? 150</text:p>
      <text:p text:style-name="P14">На часах: 2 часов 30 минут</text:p>
      <text:p text:style-name="P14"/>
      <text:p text:style-name="P14">=== Задача 6. Цепь из колец ===</text:p>
      <text:p text:style-name="P14">Толщина проволоки (мм): 2</text:p>
      <text:p text:style-name="P14">Внутренний радиус кольца (мм): 15</text:p>
      <text:p text:style-name="P14">Количество колец: 10</text:p>
      <text:p text:style-name="P14">Длина цепи: 304.0 мм</text:p>
      <text:p text:style-name="P14"/>
      <text:p text:style-name="P14">=== Задача 7. Автопробег ===</text:p>
      <text:p text:style-name="P14">Сколько км машина проезжает за час: 60</text:p>
      <text:p text:style-name="P14">Длина маршрута в км: 1500</text:p>
      <text:p text:style-name="P14">Потребуется: 1 дней и 1 часов</text:p>
      <text:p text:style-name="P14"/>
      <text:p text:style-name="P14">=== Задача 8. Парты ===</text:p>
      <text:p text:style-name="P14">Учеников в первом классе: 17</text:p>
      <text:p text:style-name="P14">Учеников во втором классе: 22</text:p>
      <text:p text:style-name="P14">Учеников в третьем классе: 23</text:p>
      <text:p text:style-name="P14">Нужно приобрести парт: 32</text:p>
      <text:p text:style-name="P14"><text:soft-page-break/></text:p>
      <text:p text:style-name="P14">=== Задача 9. Страницы книги ===</text:p>
      <text:p text:style-name="P14">Сколько строк на одной странице: 30</text:p>
      <text:p text:style-name="P14">Номер строки: 45</text:p>
      <text:p text:style-name="P14">Строка 45 находится на 2 странице, это 15-я строка на странице</text:p>
      <text:p text:style-name="P14"/>
      <text:p text:style-name="P14">=== Задача 10. Шахматная доска ===</text:p>
      <text:p text:style-name="P14">Количество строк (n): 8</text:p>
      <text:p text:style-name="P14">Количество столбцов (m): 8</text:p>
      <text:p text:style-name="P14">Чёрных клеток на доске: 32</text:p>
      <text:p text:style-name="P14"/>
      <text:p text:style-name="P14">=== Задача 11. Следующее чётное число ===</text:p>
      <text:p text:style-name="P14">Введите целое число: 7</text:p>
      <text:p text:style-name="P14">Следующее чётное: 8</text:p>
      <text:p text:style-name="P14"/>
      <text:p text:style-name="P14">=== Задача 12. Симметричное число ===</text:p>
      <text:p text:style-name="P14">Введите число от 0 до 9999: 2002</text:p>
      <text:p text:style-name="P14">Вы ввели симметричное число ;)</text:p>
      <text:p text:style-name="P14"/>
      <text:p text:style-name="P14">=== Задача 13. Максимум двух чисел (без if) ===</text:p>
      <text:p text:style-name="P14">Первое число: 8</text:p>
      <text:p text:style-name="P14">Второе число: 5</text:p>
      <text:p text:style-name="P14">Наибольшее число: 8</text:p>
      <text:p text:style-name="P14">Результат работы программы (структуры данных):</text:p>
      <text:p text:style-name="P14"/>
      <text:p text:style-name="P13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4"><text:soft-page-break/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 (дата обращения: 14.09.2025).</text:p>
      <text:p text:style-name="P14">4. Git. — Текст : электронный // Git : [сайт]. — URL: https://git-scm.com/ (дата обращения: 14.09.2025).</text:p>
      <text:p text:style-name="P14">5. GitHub. — Текст : электронный // GitHub : [сайт]. — URL: https://github.com/ (дата обращения: 14.09.2025).</text:p>
      <text:p text:style-name="P14"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2eabe5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1:13:38.857839356</meta:creation-date>
    <meta:editing-duration>PT27M29S</meta:editing-duration>
    <meta:editing-cycles>9</meta:editing-cycles>
    <meta:generator>LibreOffice/25.8.1.1$MacOSX_X86_64 LibreOffice_project/54047653041915e595ad4e45cccea684809c77b5</meta:generator>
    <dc:title>my_default</dc:title>
    <dc:date>2026-06-23T15:46:16.749104000</dc:date>
    <meta:document-statistic meta:table-count="3" meta:image-count="1" meta:object-count="0" meta:page-count="10" meta:paragraph-count="116" meta:word-count="1189" meta:character-count="8275" meta:non-whitespace-character-count="7182"/>
  </office:meta>
</office:document-meta>
</file>