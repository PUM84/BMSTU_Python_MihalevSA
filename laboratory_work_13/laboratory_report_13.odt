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7312in" style:use-optimal-column-width="false"/>
    </style:style>
    <style:style style:name="TableColumn3" style:family="table-column">
      <style:table-column-properties style:column-width="5.3465in" style:use-optimal-column-width="false"/>
    </style:style>
    <style:style style:name="Table1" style:family="table" style:master-page-name="MPF0">
      <style:table-properties style:width="7.0777in" fo:margin-left="0in" table:align="righ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en" fo:country="U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6" style:family="table-row">
      <style:table-row-properties style:min-row-height="0.0888in" style:use-optimal-row-height="false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GB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Standard" style:family="paragraph">
      <style:text-properties fo:language="en" fo:country="GB"/>
    </style:style>
    <style:style style:name="T152" style:parent-style-name="Основнойшрифтабзаца" style:family="text">
      <style:text-properties fo:language="en" fo:country="GB"/>
    </style:style>
    <style:style style:name="T153" style:parent-style-name="Основнойшрифтабзаца" style:family="text">
      <style:text-properties fo:language="en" fo:country="GB"/>
    </style:style>
    <style:style style:name="T154" style:parent-style-name="Основнойшрифтабзаца" style:family="text">
      <style:text-properties fo:language="en" fo:country="GB"/>
    </style:style>
    <style:style style:name="T155" style:parent-style-name="Основнойшрифтабзаца" style:family="text">
      <style:text-properties fo:language="en" fo:country="GB"/>
    </style:style>
    <style:style style:name="T156" style:parent-style-name="Основнойшрифтабзаца" style:family="text">
      <style:text-properties fo:language="en" fo:country="GB"/>
    </style:style>
    <style:style style:name="T157" style:parent-style-name="Основнойшрифтабзаца" style:family="text">
      <style:text-properties fo:language="en" fo:country="GB"/>
    </style:style>
    <style:style style:name="T158" style:parent-style-name="Основнойшрифтабзаца" style:family="text">
      <style:text-properties fo:language="en" fo:country="GB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P161" style:parent-style-name="Обычный" style:family="paragraph">
      <style:paragraph-properties style:vertical-align="auto" fo:margin-top="0.3333in" fo:margin-bottom="0.1666in" style:line-height-at-least="0.3333in" fo:background-color="#FFFFFF"/>
      <style:text-properties fo:hyphenate="true"/>
    </style:style>
    <style:style style:name="T162" style:parent-style-name="Строгий" style:family="text">
      <style:text-properties style:font-size-complex="14pt" style:language-asian="ru" style:country-asian="RU" style:language-complex="ar" style:country-complex="SA"/>
    </style:style>
    <style:style style:name="P163" style:parent-style-name="Обычный" style:family="paragraph">
      <style:paragraph-properties style:vertical-align="auto" fo:margin-top="0.1666in" fo:margin-bottom="0.1666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64" style:parent-style-name="Обычный" style:family="paragraph">
      <style:paragraph-properties style:vertical-align="auto" fo:background-color="#FFFFFF"/>
      <style:text-properties fo:hyphenate="true"/>
    </style:style>
    <style:style style:name="T165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style:font-size-complex="14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67" style:parent-style-name="Обычный" style:family="paragraph">
      <style:paragraph-properties style:vertical-align="auto" fo:background-color="#FFFFFF"/>
      <style:text-properties fo:hyphenate="true"/>
    </style:style>
    <style:style style:name="T168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style:font-size-complex="14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70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71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style:font-size-complex="14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73" style:parent-style-name="Обычный" style:family="paragraph">
      <style:paragraph-properties style:vertical-align="auto" fo:background-color="#FFFFFF"/>
      <style:text-properties fo:hyphenate="true"/>
    </style:style>
    <style:style style:name="T174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76" style:parent-style-name="Обычный" style:family="paragraph">
      <style:paragraph-properties style:vertical-align="auto" fo:background-color="#FFFFFF"/>
      <style:text-properties fo:hyphenate="true"/>
    </style:style>
    <style:style style:name="T177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79" style:parent-style-name="Обычный" style:family="paragraph">
      <style:paragraph-properties style:vertical-align="auto" fo:background-color="#FFFFFF"/>
      <style:text-properties fo:hyphenate="true"/>
    </style:style>
    <style:style style:name="T180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82" style:parent-style-name="Обычный" style:family="paragraph">
      <style:paragraph-properties style:vertical-align="auto" fo:background-color="#FFFFFF"/>
      <style:text-properties fo:hyphenate="true"/>
    </style:style>
    <style:style style:name="T183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86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style:font-size-complex="14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89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2" style:parent-style-name="Обычный" style:family="paragraph">
      <style:paragraph-properties style:vertical-align="auto" fo:background-color="#FFFFFF"/>
      <style:text-properties fo:hyphenate="true"/>
    </style:style>
    <style:style style:name="T193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style:font-size-complex="14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6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7" style:parent-style-name="Обычный" style:family="paragraph">
      <style:paragraph-properties style:vertical-align="auto" fo:margin-bottom="0.0833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199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 fo:margin-top="0.3333in" fo:margin-bottom="0.1666in" style:line-height-at-least="0.3333in" fo:background-color="#FFFFFF"/>
      <style:text-properties fo:hyphenate="true"/>
    </style:style>
    <style:style style:name="T205" style:parent-style-name="Строгий" style:family="text">
      <style:text-properties style:font-size-complex="14pt" style:language-asian="ru" style:country-asian="RU" style:language-complex="ar" style:country-complex="SA"/>
    </style:style>
    <style:style style:name="P206" style:parent-style-name="Обычный" style:family="paragraph">
      <style:paragraph-properties style:vertical-align="auto" fo:margin-top="0.1666in" fo:margin-bottom="0.1666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style:vertical-align="auto" fo:background-color="#FFFFFF"/>
      <style:text-properties fo:hyphenate="true"/>
    </style:style>
    <style:style style:name="T209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P211" style:parent-style-name="Обычный" style:family="paragraph">
      <style:paragraph-properties style:vertical-align="auto" fo:background-color="#FFFFFF"/>
      <style:text-properties fo:hyphenate="true"/>
    </style:style>
    <style:style style:name="T212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-asian="Times New Roman" style:font-name-complex="Segoe UI" fo:color="#0F1115" style:letter-kerning="false" style:font-size-complex="14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-asian="Times New Roman" style:font-name-complex="Segoe UI" fo:color="#0F1115" style:letter-kerning="false" style:font-size-complex="14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-asian="Times New Roman" style:font-name-complex="Segoe UI" fo:color="#0F1115" style:letter-kerning="false" style:font-size-complex="14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-asian="Times New Roman" style:font-name-complex="Segoe UI" fo:color="#0F1115" style:letter-kerning="false" style:font-size-complex="14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-asian="Times New Roman" style:font-name-complex="Segoe UI" fo:color="#0F1115" style:letter-kerning="false" style:font-size-complex="14pt" fo:language="en" fo:country="US" style:language-asian="ru" style:country-asian="RU" style:language-complex="ar" style:country-complex="SA"/>
    </style:style>
    <style:style style:name="P222" style:parent-style-name="Обычный" style:family="paragraph">
      <style:paragraph-properties style:vertical-align="auto" fo:background-color="#FFFFFF"/>
      <style:text-properties fo:hyphenate="true"/>
    </style:style>
    <style:style style:name="T223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fo:background-color="#FFFFFF"/>
      <style:text-properties fo:hyphenate="true"/>
    </style:style>
    <style:style style:name="T226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-asian="Times New Roman" style:font-name-complex="Courier New" fo:color="#0F1115" style:letter-kerning="false" style:font-size-complex="14pt" fo:background-color="#EBEEF2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/>
    </style:style>
    <style:style style:name="P231" style:parent-style-name="Обычный" style:family="paragraph">
      <style:paragraph-properties style:vertical-align="auto" fo:margin-top="0.3333in" fo:margin-bottom="0.1666in" style:line-height-at-least="0.3333in" fo:background-color="#FFFFFF"/>
      <style:text-properties fo:hyphenate="true"/>
    </style:style>
    <style:style style:name="T232" style:parent-style-name="Строгий" style:family="text">
      <style:text-properties style:font-size-complex="14pt" style:language-asian="ru" style:country-asian="RU" style:language-complex="ar" style:country-complex="SA"/>
    </style:style>
    <style:style style:name="P233" style:parent-style-name="Обычный" style:family="paragraph">
      <style:paragraph-properties style:vertical-align="auto" fo:margin-top="0.1666in" fo:margin-bottom="0.1666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34" style:parent-style-name="Обычный" style:family="paragraph">
      <style:paragraph-properties style:line-break="normal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F1115" style:letter-kerning="false" style:font-size-complex="14pt" fo:language="en" fo:country="US" style:language-asian="ru" style:country-asian="RU" style:language-complex="ar" style:country-complex="SA" fo:hyphenate="true"/>
    </style:style>
    <style:style style:name="P235" style:parent-style-name="Обычный" style:family="paragraph">
      <style:paragraph-properties style:line-break="normal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F1115" style:letter-kerning="false" style:font-size-complex="14pt" fo:language="en" fo:country="US" style:language-asian="ru" style:country-asian="RU" style:language-complex="ar" style:country-complex="SA" fo:hyphenate="true"/>
    </style:style>
    <style:style style:name="P236" style:parent-style-name="Обычный" style:family="paragraph">
      <style:paragraph-properties style:line-break="normal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F1115" style:letter-kerning="false" style:font-size-complex="14pt" fo:language="en" fo:country="US" style:language-asian="ru" style:country-asian="RU" style:language-complex="ar" style:country-complex="SA" fo:hyphenate="true"/>
    </style:style>
    <style:style style:name="P237" style:parent-style-name="Обычный" style:family="paragraph">
      <style:paragraph-properties style:line-break="normal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F1115" style:letter-kerning="false" style:font-size-complex="14pt" fo:language="en" fo:country="US" style:language-asian="ru" style:country-asian="RU" style:language-complex="ar" style:country-complex="SA" fo:hyphenate="true"/>
    </style:style>
    <style:style style:name="P238" style:parent-style-name="Обычный" style:family="paragraph">
      <style:paragraph-properties style:vertical-align="auto" fo:margin-top="0.1666in" fo:margin-bottom="0.1666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39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4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4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42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P243" style:parent-style-name="Обычный" style:family="paragraph">
      <style:paragraph-properties style:vertical-align="auto" fo:margin-top="0.1666in" fo:background-color="#FFFFFF"/>
      <style:text-properties style:font-name-asian="Times New Roman" style:font-name-complex="Segoe UI" fo:color="#0F1115" style:letter-kerning="false" style:font-size-complex="14pt" style:language-asian="ru" style:country-asian="RU" style:language-complex="ar" style:country-complex="SA" fo:hyphenate="true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 <text:span text:style-name="T18">1</text:span>3</text:p>
      <text:p text:style-name="Standard"/>
      <text:p text:style-name="Подзаголовок"><text:span text:style-name="T19">«</text:span>Виртуальное окружение<text:s/><text:span text:style-name="T20">Python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<text:span text:style-name="T31">4</text:span>9</text:p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Содержимоетаблицыпоцентру">С.А. Михалев</text:p>
          </table:table-cell>
        </table:table-row>
        <table:table-row table:style-name="TableRow36">
          <table:table-cell table:style-name="TableCell37">
            <text:p text:style-name="Примечание"/>
          </table:table-cell>
          <table:table-cell table:style-name="TableCell38">
            <text:p text:style-name="Примечание">(группа)</text:p>
          </table:table-cell>
          <table:table-cell table:style-name="TableCell39">
            <text:p text:style-name="Примечание"/>
          </table:table-cell>
          <table:table-cell table:style-name="TableCell40">
            <text:p text:style-name="Примечание">(подпись)</text:p>
          </table:table-cell>
          <table:table-cell table:style-name="TableCell41">
            <text:p text:style-name="Примечание"/>
          </table:table-cell>
          <table:table-cell table:style-name="TableCell42">
            <text:p text:style-name="Примечание">(И.О. Фамилия)</text:p>
          </table:table-cell>
        </table:table-row>
        <table:table-row table:style-name="TableRow43">
          <table:table-cell table:style-name="TableCell44">
            <text:p text:style-name="TableContents">Проверил</text:p>
          </table:table-cell>
          <table:table-cell table:style-name="TableCell45">
            <text:p text:style-name="TableContents">ассистент кафедры ИУ10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Содержимоетаблицыпоцентру">М.А. Наткин</text:p>
          </table:table-cell>
        </table:table-row>
        <table:table-row table:style-name="TableRow50"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>(подпись)</text:p>
          </table:table-cell>
          <table:table-cell table:style-name="TableCell55">
            <text:p text:style-name="Примечание"/>
          </table:table-cell>
          <table:table-cell table:style-name="TableCell56">
            <text:p text:style-name="Примечание">(И.О. Фамилия)</text:p>
          </table:table-cell>
        </table:table-row>
      </table:table>
      <text:p text:style-name="Standard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Содержание</text:p>
          <text:p text:style-name="P68"><text:a xlink:href="#__RefHeading___Toc1247_2508171050" office:target-frame-name="_top" xlink:show="replace">Постановка задачи<text:tab/>3</text:a></text:p>
          <text:p text:style-name="P69"><text:a xlink:href="#__RefHeading___Toc1249_2508171050" office:target-frame-name="_top" xlink:show="replace">Теоретическая часть<text:tab/>3</text:a></text:p>
          <text:p text:style-name="P70"><text:a xlink:href="#__RefHeading___Toc1251_2508171050" office:target-frame-name="_top" xlink:show="replace">Листинг программы<text:tab/>3</text:a></text:p>
          <text:p text:style-name="P71"><text:a xlink:href="#__RefHeading___Toc1253_2508171050" office:target-frame-name="_top" xlink:show="replace">Результат работы программы<text:tab/>4</text:a></text:p>
          <text:p text:style-name="P72"><text:a xlink:href="#__RefHeading___Toc1255_2508171050" office:target-frame-name="_top" xlink:show="replace">Список использованной литературы и материалов<text:tab/>5</text:a></text:p>
        </text:index-body>
      </text:table-of-content>
      <text:p text:style-name="Standard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h text:style-name="Заголовок1" text:outline-level="1"><text:bookmark-start text:name="__RefHeading___Toc1247_2508171050"/><text:soft-page-break/>Постановка задачи<text:bookmark-end text:name="__RefHeading___Toc1247_2508171050"/></text:h>
      <text:p text:style-name="Standard"><text:s/>В соответствии с заданием к лабораторной работе №13 необходимо выполнить следующие задачи:</text:p>
      <text:p text:style-name="Standard"><text:s/>1. Создать и активировать собственное виртуальное окружение для каталога с лабораторной работой №13.</text:p>
      <text:p text:style-name="Standard"><text:s/>2. Установить использовавшиеся в лабораторной работе №9 пакеты<text:s/><text:span text:style-name="T109">LLVMlite</text:span><text:s/>и<text:s/><text:span text:style-name="T110">RPLY</text:span>.</text:p>
      <text:p text:style-name="Standard"><text:s/>3. Перенести программу из лабораторной работы №9 в каталог лабораторной работы №13 и запустить её.</text:p>
      <text:p text:style-name="Standard"><text:s/>4. Сформировать файл<text:s/><text:span text:style-name="T111">requirements</text:span>.<text:span text:style-name="T112">txt</text:span><text:s/>для переноса проекта.</text:p>
      <text:p text:style-name="Standard"/>
      <text:h text:style-name="Заголовок1" text:outline-level="1"><text:bookmark-start text:name="__RefHeading___Toc1249_2508171050"/>Теоретическая часть<text:bookmark-end text:name="__RefHeading___Toc1249_2508171050"/></text:h>
      <text:p text:style-name="Standard"><text:s/>Виртуальное окружение (<text:span text:style-name="T113">virtual</text:span><text:s/><text:span text:style-name="T114">environment</text:span>) в<text:s/><text:span text:style-name="T115">Python</text:span><text:s/>— это изолированная среда, которая позволяет управлять зависимостями проекта отдельно от глобальной установки<text:s/><text:span text:style-name="T116">Python</text:span>. Это необходимо, когда разные проекты требуют разных версий одних и тех же пакетов, или когда нужно избежать конфликтов между пакетами.</text:p>
      <text:p text:style-name="Standard"><text:s/>Основные команды для работы с виртуальным окружением:</text:p>
      <text:p text:style-name="Standard"><text:s/>- Создание окружения:<text:s/><text:span text:style-name="T117">python</text:span><text:s/>-<text:span text:style-name="T118">m</text:span><text:s/><text:span text:style-name="T119">venv</text:span><text:s/><text:span text:style-name="T120">venv</text:span></text:p>
      <text:p text:style-name="Standard"><text:s/><text:span text:style-name="T121">- Активация окружения (Windows): venv\Scripts\activate</text:span></text:p>
      <text:p text:style-name="P122"><text:s/>- Активация окружения (Linux/Mac): source venv/bin/activate</text:p>
      <text:p text:style-name="P123"><text:s/>- Деактивация окружения: deactivate</text:p>
      <text:p text:style-name="P124"><text:s/>- Установка пакетов: pip install &lt;package_name&gt;</text:p>
      <text:p text:style-name="Standard"><text:span text:style-name="T125"><text:s/></text:span>- Создание файла зависимостей:<text:s/><text:span text:style-name="T126">pip</text:span><text:s/><text:span text:style-name="T127">freeze</text:span><text:s/>&gt;<text:s/><text:span text:style-name="T128">requirements</text:span>.<text:span text:style-name="T129">txt</text:span></text:p>
      <text:p text:style-name="Standard"><text:s/>- Установка зависимостей из файла:<text:s/><text:span text:style-name="T130">pip</text:span><text:s/><text:span text:style-name="T131">install</text:span><text:s/>-<text:span text:style-name="T132">r</text:span><text:s/><text:span text:style-name="T133">requirements</text:span>.<text:span text:style-name="T134">txt</text:span></text:p>
      <text:p text:style-name="Standard"/>
      <text:p text:style-name="Standard"><text:s/>В данной работе используются следующие пакеты:</text:p>
      <text:p text:style-name="Standard"><text:s/>-<text:s/><text:span text:style-name="T135">LLVMlite</text:span><text:s/>(<text:span text:style-name="T136">llvmlite</text:span>): легковесная обертка вокруг<text:s/><text:span text:style-name="T137">LLVM</text:span>, используется для генерации машинного кода и<text:s/><text:span text:style-name="T138">JIT</text:span>-компиляции.</text:p>
      <text:p text:style-name="Standard"><text:s/>-<text:s/><text:span text:style-name="T139">RPLY</text:span>: аналог<text:s/><text:span text:style-name="T140">lex</text:span><text:s/>и<text:s/><text:span text:style-name="T141">yacc</text:span><text:s/>для<text:s/><text:span text:style-name="T142">Python</text:span>, используется для создания лексических анализаторов и парсеров.</text:p>
      <text:p text:style-name="Standard"/>
      <text:h text:style-name="Заголовок1" text:outline-level="1"><text:bookmark-start text:name="__RefHeading___Toc1251_2508171050"/>Листинг программы<text:bookmark-end text:name="__RefHeading___Toc1251_2508171050"/></text:h>
      <text:p text:style-name="Standard"><text:s/>Исходный код программы (листинг) размещен в репозитории<text:s/><text:span text:style-name="T143">GitHub</text:span><text:s/>по адресу:</text:p>
      <text:p text:style-name="Standard"><text:s/><text:span text:style-name="T144">https</text:span>://<text:span text:style-name="T145">github</text:span>.<text:span text:style-name="T146">com</text:span>/<text:span text:style-name="T147">PUM</text:span>84/<text:span text:style-name="T148">BMSTU</text:span>_<text:span text:style-name="T149">Python</text:span>_<text:span text:style-name="T150">MihalevSA</text:span></text:p>
      <text:p text:style-name="P151"/>
      <text:p text:style-name="Standard">Структура каталога лабораторной работы №13:</text:p>
      <text:p text:style-name="Standard">lab13/</text:p>
      <text:p text:style-name="Standard">├── venv<text:span text:style-name="T152">/</text:span></text:p>
      <text:p text:style-name="Standard">│ <text:s text:c="2"/>├── Include/</text:p>
      <text:p text:style-name="Standard">│ <text:s text:c="2"/>├── Lib/</text:p>
      <text:p text:style-name="Standard">│ <text:s text:c="2"/>├── Scripts/</text:p>
      <text:p text:style-name="Standard">│ <text:s text:c="2"/>├── .gitignore</text:p>
      <text:p text:style-name="Standard">│ <text:s text:c="2"/>└── pyvenv.cfg</text:p>
      <text:soft-page-break/>
      <text:p text:style-name="Standard">├── requirements.<text:span text:style-name="T153">txt</text:span></text:p>
      <text:p text:style-name="Standard">├── main.<text:span text:style-name="T154">py</text:span></text:p>
      <text:p text:style-name="Standard">├── lexer.<text:span text:style-name="T155">py</text:span></text:p>
      <text:p text:style-name="Standard">├── parser.<text:span text:style-name="T156">py</text:span></text:p>
      <text:p text:style-name="Standard">├── ast.<text:span text:style-name="T157">py</text:span></text:p>
      <text:p text:style-name="Standard">└── codegen.<text:span text:style-name="T158">py</text:span></text:p>
      <text:p text:style-name="Standard"/>
      <text:p text:style-name="Standard"><text:s/>Содержание файла<text:s/><text:span text:style-name="T159">requirements</text:span>.<text:span text:style-name="T160">txt</text:span>:</text:p>
      <text:p text:style-name="Standard">llvmlite==0.47.0</text:p>
      <text:p text:style-name="Standard">rply==0.7.8</text:p>
      <text:p text:style-name="Standard"/>
      <text:h text:style-name="P161" text:outline-level="2"><text:bookmark-start text:name="__RefHeading___Toc1253_2508171050"/><text:span text:style-name="T162">Описание модулей программы</text:span></text:h>
      <text:p text:style-name="P163">Программа представляет собой реализацию компилятора для простого языка программирования, поддерживающего арифметические выражения и команды вывода. Основные модули:</text:p>
      <text:list text:style-name="LFO4" text:continue-numbering="true">
        <text:list-item>
          <text:p text:style-name="P164"><text:span text:style-name="T165">lexer.py</text:span><text:span text:style-name="T166"> — лексический анализатор, реализованный с использованием RPLY. Он разбивает исходный код на токены: числа, операторы, ключевые слова (print, gen) и разделители.</text:span></text:p>
        </text:list-item>
        <text:list-item>
          <text:p text:style-name="P167"><text:span text:style-name="T168">parser.py</text:span><text:span text:style-name="T169"> — синтаксический анализатор, построенный на основе грамматики языка. Он преобразует поток токенов в абстрактное синтаксическое дерево (AST), используя правила приоритета операторов.</text:span></text:p>
        </text:list-item>
        <text:list-item>
          <text:p text:style-name="P170"><text:span text:style-name="T171">ast.py</text:span><text:span text:style-name="T172"> — содержит классы узлов абстрактного синтаксического дерева:</text:span></text:p>
          <text:list text:continue-numbering="true">
            <text:list-item>
              <text:p text:style-name="P173"><text:span text:style-name="T174">Number</text:span><text:span text:style-name="T175"> — представляет числовой литерал</text:span></text:p>
            </text:list-item>
            <text:list-item>
              <text:p text:style-name="P176"><text:span text:style-name="T177">BinaryOp</text:span><text:span text:style-name="T178"> — представляет бинарную операцию (сложение, вычитание, умножение, деление)</text:span></text:p>
            </text:list-item>
            <text:list-item>
              <text:p text:style-name="P179"><text:span text:style-name="T180">Print</text:span><text:span text:style-name="T181"> — представляет команду вывода значения</text:span></text:p>
            </text:list-item>
            <text:list-item>
              <text:p text:style-name="P182"><text:span text:style-name="T183">Gen</text:span><text:span text:style-name="T184"> — полный синоним команды print, используется для генерации IR</text:span></text:p>
            </text:list-item>
          </text:list>
        </text:list-item>
        <text:list-item>
          <text:p text:style-name="P185"><text:span text:style-name="T186">codegen.py</text:span><text:span text:style-name="T187"> — модуль генерации LLVM-кода:</text:span></text:p>
          <text:list text:continue-numbering="true">
            <text:list-item>
              <text:p text:style-name="P188">Создает LLVM-модуль с функцией main</text:p>
            </text:list-item>
            <text:list-item>
              <text:p text:style-name="P189">Генерирует промежуточное представление (IR) для каждой конструкции языка</text:p>
            </text:list-item>
            <text:list-item>
              <text:p text:style-name="P190">Обеспечивает JIT-компиляцию и выполнение сгенерированного кода</text:p>
            </text:list-item>
            <text:list-item>
              <text:p text:style-name="P191">Реализует функцию вывода printf для отображения результатов</text:p>
            </text:list-item>
          </text:list>
        </text:list-item>
        <text:list-item>
          <text:p text:style-name="P192"><text:span text:style-name="T193">main.py</text:span><text:span text:style-name="T194"> — точка входа в программу, объединяющая все модули. Поддерживает интерактивный режим и выполнение из файла.</text:span></text:p>
        </text:list-item>
      </text:list>
      <text:h text:style-name="Заголовок1" text:outline-level="1">Результат работы программы<text:bookmark-end text:name="__RefHeading___Toc1253_2508171050"/></text:h>
      <text:list text:style-name="LFO1" text:continue-numbering="true">
        <text:list-item>
          <text:p text:style-name="P195">Создано и активировано виртуальное окружение для изоляции зависимостей проекта.</text:p>
        </text:list-item>
        <text:list-item>
          <text:p text:style-name="P196">Установлены необходимые пакеты llvmlite и rply указанных версий.</text:p>
        </text:list-item>
        <text:list-item>
          <text:p text:style-name="P197">Реализован компилятор, который:</text:p>
          <text:list text:continue-numbering="true">
            <text:list-item>
              <text:p text:style-name="P198">Выполняет лексический и синтаксический анализ входного кода</text:p>
            </text:list-item>
            <text:list-item>
              <text:p text:style-name="P199">Строит абстрактное синтаксическое дерево</text:p>
            </text:list-item>
            <text:list-item>
              <text:p text:style-name="P200">Генерирует LLVM IR код для арифметических выражений</text:p>
            </text:list-item>
            <text:list-item>
              <text:p text:style-name="P201">Выполняет JIT-компиляцию и запуск программы</text:p>
            </text:list-item>
          </text:list>
        </text:list-item>
        <text:list-item>
          <text:p text:style-name="P202">Программа успешно обрабатывает команды print и gen, вычисляя арифметические выражения.</text:p>
        </text:list-item>
        <text:list-item>
          <text:p text:style-name="P203">Создан файл requirements.txt для воспроизведения окружения на других машинах.</text:p>
        </text:list-item>
      </text:list>
      <text:h text:style-name="P204" text:outline-level="2"><text:span text:style-name="T205">Проверка переносимости проекта</text:span></text:h>
      <text:p text:style-name="P206">Для развертывания проекта на другом компьютере необходимо выполнить следующие шаги:</text:p>
      <text:list text:style-name="LFO2" text:continue-numbering="true">
        <text:list-item>
          <text:p text:style-name="P207">Скопировать каталог проекта (исключая папку venv) на целевой компьютер</text:p>
        </text:list-item>
        <text:list-item>
          <text:p text:style-name="P208"><text:span text:style-name="T209">Создать виртуальное окружение: </text:span><text:span text:style-name="T210">python -m venv venv</text:span></text:p>
        </text:list-item>
        <text:list-item>
          <text:p text:style-name="P211"><text:span text:style-name="T212">Активировать</text:span><text:span text:style-name="T213"><text:s/></text:span><text:span text:style-name="T214">окружение</text:span><text:span text:style-name="T215">: </text:span><text:span text:style-name="T216">source venv/bin/activate</text:span><text:span text:style-name="T217"> (Linux/Mac)<text:s/></text:span><text:span text:style-name="T218">или</text:span><text:span text:style-name="T219"> </text:span><text:span text:style-name="T220">venv\Scripts\activate</text:span><text:span text:style-name="T221"> (Windows)</text:span></text:p>
        </text:list-item>
        <text:list-item>
          <text:p text:style-name="P222"><text:span text:style-name="T223">Установить зависимости: </text:span><text:span text:style-name="T224">pip install -r requirements.txt</text:span></text:p>
        </text:list-item>
        <text:list-item>
          <text:p text:style-name="P225"><text:span text:style-name="T226">Запустить программу: </text:span><text:span text:style-name="T227">python main.py</text:span><text:span text:style-name="T228"> для интерактивного режима или </text:span><text:span text:style-name="T229">python main.py source.prg</text:span><text:span text:style-name="T230"> для выполнения из файла</text:span></text:p>
        </text:list-item>
      </text:list>
      <text:h text:style-name="P231" text:outline-level="2"><text:span text:style-name="T232">Демонстрация работы</text:span></text:h>
      <text:p text:style-name="P233">При запуске программы с тестовым кодом:</text:p>
      <text:p text:style-name="P234">print(2 + 3);</text:p>
      <text:p text:style-name="P235">print(10 - 4);</text:p>
      <text:p text:style-name="P236">gen(7 * 8);</text:p>
      <text:p text:style-name="P237">print((5 + 5) / 2);</text:p>
      <text:p text:style-name="P238">Программа выполняет компиляцию и выводит результаты вычислений:</text:p>
      <text:list text:style-name="LFO3" text:continue-numbering="true">
        <text:list-item>
          <text:p text:style-name="P239">Вывод значения 5 (результат 2+3)</text:p>
        </text:list-item>
        <text:list-item>
          <text:p text:style-name="P240">Вывод значения 6 (результат 10-4)</text:p>
        </text:list-item>
        <text:list-item>
          <text:p text:style-name="P241">Вывод значения 56 (результат 7*8)</text:p>
        </text:list-item>
        <text:list-item>
          <text:p text:style-name="P242">Вывод значения 5 (результат (5+5)/2)</text:p>
        </text:list-item>
      </text:list>
      <text:p text:style-name="P243">Таким образом, разработанный компилятор успешно транслирует арифметические выражения в машинный код с помощью LLVM и выполняет их, обеспечивая корректный вывод результатов.</text:p>
      <text:p text:style-name="Standard"/>
      <text:h text:style-name="Заголовок1" text:outline-level="1"><text:bookmark-start text:name="__RefHeading___Toc1255_2508171050"/>Список использованной литературы и материалов<text:bookmark-end text:name="__RefHeading___Toc1255_2508171050"/></text:h>
      <text:p text:style-name="Standard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soft-page-break/>
      <text:p text:style-name="Standard"><text:s text:c="4"/>2. Брюс М. Ван Хорн<text:s/><text:span text:style-name="T244">II</text:span>, Куан Нгуен.<text:s/><text:span text:style-name="T245">PyCharm</text:span>: профессиональная работа на<text:s/><text:span text:style-name="T246">Python</text:span><text:s/>/ пер. с англ. И.Л. Люско. – М.:ДМК Пресс, 2024. – 618 с.: ил.</text:p>
      <text:p text:style-name="Standard"><text:s text:c="4"/>3.<text:s/><text:span text:style-name="T247">Welcome</text:span><text:s/><text:span text:style-name="T248">to</text:span><text:s/><text:span text:style-name="T249">python</text:span>.<text:span text:style-name="T250">org</text:span>. — Текст : электронный //<text:s/><text:span text:style-name="T251">The</text:span><text:s/><text:span text:style-name="T252">official</text:span><text:s/><text:span text:style-name="T253">home</text:span><text:s/><text:span text:style-name="T254">of</text:span><text:s/><text:span text:style-name="T255">the</text:span><text:s/><text:span text:style-name="T256">Python</text:span><text:s/><text:span text:style-name="T257">Programming</text:span><text:s/><text:span text:style-name="T258">Language</text:span><text:s/>: [сайт]. —<text:s/><text:span text:style-name="T259">URL</text:span>:<text:s/><text:span text:style-name="T260">https</text:span>://<text:span text:style-name="T261">www</text:span>.<text:span text:style-name="T262">python</text:span>.<text:span text:style-name="T263">org</text:span>/ (дата обращения: 14.09.2025).</text:p>
      <text:p text:style-name="Standard"><text:s text:c="4"/>4.<text:s/><text:span text:style-name="T264">Git</text:span>. — Текст : электронный //<text:s/><text:span text:style-name="T265">Git</text:span><text:s/>: [сайт]. —<text:s/><text:span text:style-name="T266">URL</text:span>:<text:s/><text:span text:style-name="T267">https</text:span>://<text:span text:style-name="T268">git</text:span>-<text:span text:style-name="T269">scm</text:span>.<text:span text:style-name="T270">com</text:span>/ (дата обращения: 14.09.2025).</text:p>
      <text:p text:style-name="Standard"><text:s text:c="4"/>5.<text:s/><text:span text:style-name="T271">GitHub</text:span>. — Текст : электронный //<text:s/><text:span text:style-name="T272">GitHub</text:span><text:s/>: [сайт]. —<text:s/><text:span text:style-name="T273">URL</text:span>:<text:s/><text:span text:style-name="T274">https</text:span>://<text:span text:style-name="T275">github</text:span>.<text:span text:style-name="T276">com</text:span>/ (дата обращения: 14.09.2025).</text:p>
      <text:p text:style-name="Standard"><text:s text:c="4"/><text:span text:style-name="T277">6. PyCharm: The only Python IDE you need. — Текст : электронный // JetBrains: Essential tools for software developers and teams : [сайт]. — URL: https://www.jetbrains.com/pycharm/ (дата обращения: 14.09.2025).</text:span></text:p>
      <text:p text:style-name="P278"><text:s text:c="4"/>7. llvmlite documentation. — Текст : электронный // llvmlite : [сайт]. — URL: https://llvmlite.readthedocs.io/ (дата обращения: 14.09.2025).</text:p>
      <text:p text:style-name="Standard"><text:span text:style-name="T279"><text:s text:c="4"/></text:span>8.<text:s/><text:span text:style-name="T280">RPLY</text:span><text:s/><text:span text:style-name="T281">documentation</text:span>. — Текст : электронный //<text:s/><text:span text:style-name="T282">RPLY</text:span><text:s/>: [сайт]. —<text:s/><text:span text:style-name="T283">URL</text:span>:<text:s/><text:span text:style-name="T284">https</text:span>://<text:span text:style-name="T285">rply</text:span>.<text:span text:style-name="T286">readthedocs</text:span>.<text:span text:style-name="T287">io</text:span>/ (дата обращения: 14.09.2025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13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<text:span text:style-name="T13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6-06-25T04:23:00Z</meta:creation-date>
    <dc:date>2026-06-25T04:24:00Z</dc:date>
    <meta:template xlink:href="Normal" xlink:type="simple"/>
    <meta:editing-cycles>2</meta:editing-cycles>
    <meta:editing-duration>PT360S</meta:editing-duration>
    <meta:document-statistic meta:page-count="6" meta:paragraph-count="13" meta:word-count="1016" meta:character-count="6799" meta:row-count="48" meta:non-whitespace-character-count="5796"/>
  </office:meta>
</office:document-meta>
</file>